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2">
      <style:paragraph-properties fo:margin-left="0in" fo:margin-right="0in" fo:margin-top="0.3335in" fo:margin-bottom="0.1665in" style:contextual-spacing="false" style:line-height-at-least="0.3335in" fo:orphans="2" fo:widows="2" fo:text-indent="0in" style:auto-text-indent="false"/>
      <style:text-properties fo:font-variant="normal" fo:text-transform="none" fo:color="#0f1115" loext:opacity="100%" fo:letter-spacing="normal" loext:padding="0in" loext:border="none"/>
    </style:style>
    <style:style style:name="P2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</style:style>
    <style:style style:name="P3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  <style:text-properties fo:font-variant="normal" fo:text-transform="none" fo:color="#0f1115" loext:opacity="100%" fo:letter-spacing="normal" loext:padding="0in" loext:border="none"/>
    </style:style>
    <style:style style:name="P4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  <style:text-properties fo:font-variant="normal" fo:text-transform="none" fo:color="#0f1115" loext:opacity="100%" style:font-name="quote-cjk-patch" fo:font-size="15pt" fo:letter-spacing="normal" fo:font-style="normal" fo:font-weight="bold" loext:padding="0in" loext:border="none"/>
    </style:style>
    <style:style style:name="P5" style:family="paragraph" style:parent-style-name="Horizontal_20_Line">
      <style:paragraph-properties style:line-height-at-least="0.2917in" fo:orphans="2" fo:widows="2" fo:text-indent="0in" style:auto-text-indent="false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0f1115" loext:opacity="100%" style:font-name="Menlo" fo:font-size="9.75pt" fo:letter-spacing="normal" fo:font-style="normal" fo:font-weight="normal" loext:padding="0in" loext:border="none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0f1115" loext:opacity="100%" fo:letter-spacing="normal" loext:padding="0in" loext:border="none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a0a1a7" loext:opacity="100%" style:font-name="Menlo" fo:font-size="9.75pt" fo:letter-spacing="normal" fo:font-style="italic" fo:font-weight="normal" loext:padding="0in" loext:border="none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10" style:family="paragraph" style:parent-style-name="Text_20_body" style:list-style-name="L3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f1115" loext:opacity="100%" style:font-name="quote-cjk-patch" fo:font-size="12pt" fo:letter-spacing="normal" fo:font-style="normal" fo:font-weight="normal" loext:padding="0in" loext:border="none"/>
    </style:style>
    <style:style style:name="P11" style:family="paragraph" style:parent-style-name="Text_20_body">
      <style:paragraph-properties fo:margin-left="0in" fo:margin-right="0in" fo:margin-top="0.1665in" fo:margin-bottom="0.1665in" style:contextual-spacing="false" style:line-height-at-least="0.2917in" fo:orphans="2" fo:widows="2" fo:text-indent="0in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 loext:padding="0in" loext:border="none"/>
    </style:style>
    <style:style style:name="P12" style:family="paragraph" style:parent-style-name="Text_20_body">
      <style:paragraph-properties fo:margin-left="0in" fo:margin-right="0in" fo:margin-top="0in" fo:margin-bottom="0.1665in" style:contextual-spacing="false" style:line-height-at-least="0.2917in" fo:orphans="2" fo:widows="2" fo:text-indent="0in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 loext:padding="0in" loext:border="none"/>
    </style:style>
    <style:style style:name="P13" style:family="paragraph" style:parent-style-name="Text_20_body">
      <style:paragraph-properties fo:margin-left="0in" fo:margin-right="0in" fo:margin-top="0.1665in" fo:margin-bottom="0in" style:contextual-spacing="false" style:line-height-at-least="0.2917in" fo:orphans="2" fo:widows="2" fo:text-indent="0in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 loext:padding="0in" loext:border="none"/>
    </style:style>
    <style:style style:name="P14" style:family="paragraph" style:parent-style-name="Text_20_body">
      <style:paragraph-properties fo:margin-left="0.3937in" fo:margin-right="0.3937in" fo:margin-top="0in" fo:margin-bottom="0in" style:contextual-spacing="false" style:line-height-at-least="0.2917in" fo:orphans="2" fo:widows="2" fo:text-indent="0in" style:auto-text-indent="false" fo:padding-left="0.1457in" fo:padding-right="0in" fo:padding-top="0in" fo:padding-bottom="0in" fo:border-left="0.74pt solid #adb2b8" fo:border-right="none" fo:border-top="none" fo:border-bottom="none"/>
      <style:text-properties fo:font-variant="normal" fo:text-transform="none" fo:color="#0f1115" loext:opacity="100%" style:font-name="quote-cjk-patch" fo:font-size="12pt" fo:letter-spacing="normal" fo:font-style="normal" fo:font-weight="normal" loext:padding="0in" loext:border="none"/>
    </style:style>
    <style:style style:name="P15" style:family="paragraph" style:parent-style-name="Text_20_body" style:list-style-name="L9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f1115" loext:opacity="100%" style:font-name="quote-cjk-patch" fo:font-size="12pt" fo:letter-spacing="normal" fo:font-style="normal" fo:font-weight="normal" loext:padding="0in" loext:border="none"/>
    </style:style>
    <style:style style:name="P16" style:family="paragraph" style:parent-style-name="Text_20_body">
      <style:paragraph-properties fo:margin-left="0in" fo:margin-right="0in" style:line-height-at-least="0.25in" fo:orphans="2" fo:widows="2" fo:text-indent="0in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 loext:padding="0in" loext:border="none"/>
    </style:style>
    <style:style style:name="P17" style:family="paragraph" style:parent-style-name="Text_20_body">
      <style:paragraph-properties fo:margin-left="0.0835in" fo:margin-right="0in" style:line-height-at-least="0.1874in" fo:orphans="2" fo:widows="2" fo:text-indent="0in" style:auto-text-indent="false"/>
      <style:text-properties fo:font-variant="normal" fo:text-transform="none" fo:color="#0f1115" loext:opacity="100%" style:font-name="Menlo" fo:font-size="9pt" fo:letter-spacing="normal" fo:font-style="normal" fo:font-weight="normal" fo:background-color="#ffffff" loext:padding="0in" loext:border="none"/>
    </style:style>
    <style:style style:name="P18" style:family="paragraph" style:parent-style-name="Text_20_body">
      <style:paragraph-properties fo:margin-left="0in" fo:margin-right="0in" fo:margin-top="0.1252in" fo:margin-bottom="0in" style:contextual-spacing="false" style:line-height-at-least="0.25in" fo:orphans="2" fo:widows="2" fo:text-indent="0in" style:auto-text-indent="false"/>
      <style:text-properties fo:font-variant="normal" fo:text-transform="none" fo:color="#61666b" loext:opacity="100%" style:font-name="quote-cjk-patch" fo:font-size="10.5pt" fo:letter-spacing="normal" fo:font-style="normal" fo:font-weight="normal" loext:padding="0in" loext:border="none"/>
    </style:style>
    <style:style style:name="P19" style:family="paragraph" style:parent-style-name="Text_20_body">
      <style:paragraph-properties fo:margin-left="0in" fo:margin-right="0in" fo:margin-top="0.1252in" fo:margin-bottom="0.1252in" style:contextual-spacing="false" style:line-height-at-least="0.25in" fo:orphans="2" fo:widows="2" fo:text-indent="0in" style:auto-text-indent="false"/>
      <style:text-properties fo:font-variant="normal" fo:text-transform="none" fo:color="#61666b" loext:opacity="100%" style:font-name="quote-cjk-patch" fo:font-size="10.5pt" fo:letter-spacing="normal" fo:font-style="normal" fo:font-weight="normal" loext:padding="0in" loext:border="none"/>
    </style:style>
    <style:style style:name="P20" style:family="paragraph" style:parent-style-name="Text_20_body" style:list-style-name="L8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61666b" loext:opacity="100%" style:font-name="quote-cjk-patch" fo:font-size="10.5pt" fo:letter-spacing="normal" fo:font-style="normal" fo:font-weight="normal" loext:padding="0in" loext:border="none"/>
    </style:style>
    <style:style style:name="P21" style:family="paragraph" style:parent-style-name="Text_20_body">
      <style:paragraph-properties fo:margin-left="0in" fo:margin-right="0in" fo:margin-top="0.1665in" fo:margin-bottom="0.1665in" style:contextual-spacing="false" style:line-height-at-least="0.2917in" fo:orphans="2" fo:widows="2" fo:text-indent="0in" style:auto-text-indent="false"/>
    </style:style>
    <style:style style:name="P22" style:family="paragraph" style:parent-style-name="Text_20_body">
      <style:paragraph-properties fo:margin-left="0in" fo:margin-right="0in" fo:margin-top="0in" fo:margin-bottom="0.1665in" style:contextual-spacing="false" style:line-height-at-least="0.2917in" fo:orphans="2" fo:widows="2" fo:text-indent="0in" style:auto-text-indent="false"/>
    </style:style>
    <style:style style:name="P23" style:family="paragraph" style:parent-style-name="Text_20_body" style:list-style-name="L1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24" style:family="paragraph" style:parent-style-name="Text_20_body" style:list-style-name="L2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25" style:family="paragraph" style:parent-style-name="Text_20_body" style:list-style-name="L3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26" style:family="paragraph" style:parent-style-name="Text_20_body" style:list-style-name="L3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</style:style>
    <style:style style:name="P27" style:family="paragraph" style:parent-style-name="Text_20_body">
      <style:paragraph-properties fo:margin-left="0in" fo:margin-right="0in" fo:margin-top="0.1665in" fo:margin-bottom="0.1665in" style:contextual-spacing="false" style:line-height-at-least="0.2291in" fo:orphans="2" fo:widows="2" fo:text-indent="0in" style:auto-text-indent="false"/>
    </style:style>
    <style:style style:name="P28" style:family="paragraph" style:parent-style-name="Text_20_body">
      <style:paragraph-properties fo:margin-left="0in" fo:margin-right="0in" fo:margin-top="0.1665in" fo:margin-bottom="0in" style:contextual-spacing="false" style:line-height-at-least="0.2291in" fo:orphans="2" fo:widows="2" fo:text-indent="0in" style:auto-text-indent="false"/>
    </style:style>
    <style:style style:name="P29" style:family="paragraph" style:parent-style-name="Text_20_body">
      <style:paragraph-properties fo:margin-left="0.3937in" fo:margin-right="0.3937in" fo:margin-top="0in" fo:margin-bottom="0in" style:contextual-spacing="false" style:line-height-at-least="0.2291in" fo:orphans="2" fo:widows="2" fo:text-indent="0in" style:auto-text-indent="false" fo:padding-left="0.1457in" fo:padding-right="0in" fo:padding-top="0in" fo:padding-bottom="0in" fo:border-left="0.74pt solid #adb2b8" fo:border-right="none" fo:border-top="none" fo:border-bottom="none"/>
    </style:style>
    <style:style style:name="P30" style:family="paragraph" style:parent-style-name="Text_20_body" style:list-style-name="L4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31" style:family="paragraph" style:parent-style-name="Text_20_body" style:list-style-name="L5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32" style:family="paragraph" style:parent-style-name="Text_20_body" style:list-style-name="L6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33" style:family="paragraph" style:parent-style-name="Text_20_body" style:list-style-name="L7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34" style:family="paragraph" style:parent-style-name="Text_20_body" style:list-style-name="L9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T1" style:family="text">
      <style:text-properties style:font-name="quote-cjk-patch" fo:font-size="16.5pt" fo:font-style="normal" fo:font-weight="bold"/>
    </style:style>
    <style:style style:name="T2" style:family="text">
      <style:text-properties style:font-name="quote-cjk-patch" fo:font-size="15pt" fo:font-style="normal" fo:font-weight="bold"/>
    </style:style>
    <style:style style:name="T3" style:family="text">
      <style:text-properties fo:font-variant="normal" fo:text-transform="none" fo:color="#0f1115" loext:opacity="100%" style:font-name="quote-cjk-patch" fo:font-size="12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0f1115" loext:opacity="100%" style:font-name="quote-cjk-patch" fo:font-size="12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0f1115" loext:opacity="100%" style:font-name="quote-cjk-patch" fo:font-size="15pt" fo:letter-spacing="normal" fo:font-style="normal" fo:font-weight="bold" loext:padding="0in" loext:border="none"/>
    </style:style>
    <style:style style:name="T6" style:family="text">
      <style:text-properties fo:font-variant="normal" fo:text-transform="none" fo:color="#0f1115" loext:opacity="100%" style:font-name="Menlo" fo:font-size="12pt" fo:letter-spacing="normal" fo:font-style="normal" fo:font-weight="normal" fo:background-color="#ebeef2" loext:char-shading-value="0" loext:padding="0in" loext:border="none"/>
    </style:style>
    <style:style style:name="T7" style:family="text">
      <style:text-properties fo:font-variant="normal" fo:text-transform="none" fo:color="#0f1115" loext:opacity="100%" style:font-name="Menlo" fo:font-size="15pt" fo:letter-spacing="normal" fo:font-style="normal" fo:font-weight="bold" fo:background-color="#ebeef2" loext:char-shading-value="0" loext:padding="0in" loext:border="none"/>
    </style:style>
    <style:style style:name="T8" style:family="text">
      <style:text-properties style:font-name="Menlo" fo:font-size="9.75pt" fo:font-style="normal" fo:font-weight="normal"/>
    </style:style>
    <style:style style:name="T9" style:family="text">
      <style:text-properties fo:color="#a626a4" loext:opacity="100%"/>
    </style:style>
    <style:style style:name="T10" style:family="text">
      <style:text-properties fo:color="#a626a4" loext:opacity="100%" style:font-name="Menlo" fo:font-size="9.75pt" fo:font-style="normal" fo:font-weight="normal"/>
    </style:style>
    <style:style style:name="T11" style:family="text">
      <style:text-properties fo:color="#383a42" loext:opacity="100%"/>
    </style:style>
    <style:style style:name="T12" style:family="text">
      <style:text-properties fo:color="#383a42" loext:opacity="100%" style:font-name="Menlo" fo:font-size="9.75pt" fo:font-style="normal" fo:font-weight="normal"/>
    </style:style>
    <style:style style:name="T13" style:family="text">
      <style:text-properties fo:color="#b76b01" loext:opacity="100%"/>
    </style:style>
    <style:style style:name="T14" style:family="text">
      <style:text-properties fo:color="#4078f2" loext:opacity="100%"/>
    </style:style>
    <style:style style:name="T15" style:family="text">
      <style:text-properties fo:color="#50a14f" loext:opacity="100%"/>
    </style:style>
    <style:style style:name="T16" style:family="text">
      <style:text-properties fo:color="#50a14f" loext:opacity="100%" style:font-name="Menlo" fo:font-size="9.75pt" fo:font-style="normal" fo:font-weight="normal"/>
    </style:style>
    <style:style style:name="T17" style:family="text">
      <style:text-properties fo:color="#a0a1a7" loext:opacity="100%" style:font-name="Menlo" fo:font-size="9.75pt" fo:font-style="italic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Strong_20_Emphasis"><text:span text:style-name="T3">Olá, pequeno gafanhoto do mainframe!</text:span></text:span><text:span text:style-name="T4"> 🖖<text:line-break/>Seja bem-vindo à primeira aula do teu plano de superação. Prepara o café, ajeita a postura e vamos mergulhar na espinha dorsal de tudo o que vais construir nos próximos 5 meses: </text:span><text:span text:style-name="Strong_20_Emphasis"><text:span text:style-name="T3">a estrutura base do COBOL</text:span></text:span><text:span text:style-name="T4">.</text:span></text:p>
      <text:p text:style-name="P11">Com 20 anos de mainframe nas costas, eu digo-te uma coisa: quem entende esta estrutura com profundidade nunca mais passa vergonha numa entrevista. E tu, que já és programador C#, tens uma vantagem gigantesca — já sabes o que é lógica. Aqui, a diferença é que a casa tem regras mais rígidas de arrumação.</text:p>
      <text:p text:style-name="P5"/>
      <text:h text:style-name="P1" text:outline-level="2">🏛️ <text:span text:style-name="T1">Por que o COBOL tem essa estrutura fixa?</text:span></text:h>
      <text:p text:style-name="P11">Imagina que vais construir uma casa. Primeiro, identificas o terreno (IDENTIFICATION). Depois, especificas o ambiente — onde ficam as janelas, o jardim (ENVIRONMENT). A seguir, compras os materiais — cimento, tijolos, variáveis — e guardas no depósito (DATA). Por fim, colocas a mão na massa e constróis as paredes (PROCEDURE).</text:p>
      <text:p text:style-name="P21"><text:span text:style-name="T4">O COBOL foi criado nos anos 60 com uma missão clara: </text:span><text:span text:style-name="Strong_20_Emphasis"><text:span text:style-name="T3">ser compreensível para não programadores</text:span></text:span><text:span text:style-name="T4">. Cada programa é um documento técnico que um contabilista ou um gestor deveria conseguir ler. Por isso, a estrutura é uma "redação" com capítulos obrigatórios, escritos quase em inglês corrente.</text:span></text:p>
      <text:p text:style-name="P5"/>
      <text:h text:style-name="P1" text:outline-level="2">📜 <text:span text:style-name="T1">As 4 Divisões Sagradas</text:span></text:h>
      <text:p text:style-name="P27"><text:span text:style-name="T4">Abre o teu ficheiro </text:span><text:span text:style-name="Source_20_Text"><text:span text:style-name="T6">.cob</text:span></text:span><text:span text:style-name="T4"> e olha para ele como um mapa. Cada </text:span><text:span text:style-name="Source_20_Text"><text:span text:style-name="T6">DIVISION</text:span></text:span><text:span text:style-name="T4"> é um continente.</text:span></text:p>
      <text:h text:style-name="P2" text:outline-level="3"><text:soft-page-break/><text:span text:style-name="T5">1. </text:span><text:span text:style-name="Source_20_Text"><text:span text:style-name="T7">IDENTIFICATION DIVISION.</text:span></text:span><text:span text:style-name="T5"> — O RG do programa</text:span></text:h>
      <text:p text:style-name="P17">cobol</text:p>
      <text:p text:style-name="P6"><text:span text:style-name="T9">IDENTIFICATION</text:span> <text:span text:style-name="T9">DIVISION</text:span><text:span text:style-name="T11">.</text:span></text:p>
      <text:p text:style-name="P6"><text:span text:style-name="T9">PROGRAM-ID</text:span><text:span text:style-name="T11">.</text:span> MEU-PROGRAMA<text:span text:style-name="T11">.</text:span></text:p>
      <text:p text:style-name="P27"><text:span text:style-name="T4">Aqui não há segredo: é onde dás o nome ao bicho.<text:line-break/>O </text:span><text:span text:style-name="Source_20_Text"><text:span text:style-name="T6">PROGRAM-ID</text:span></text:span><text:span text:style-name="T4"> é o identificador único do teu programa dentro do sistema. Sem ele, o compilador nem olha para a tua cara.<text:line-break/>É como o nome de uma classe em C#:</text:span></text:p>
      <text:p text:style-name="P17">csharp</text:p>
      <text:p text:style-name="P6"><text:span text:style-name="T9">public</text:span> <text:span text:style-name="T9">class</text:span> <text:span text:style-name="T13">MeuPrograma</text:span> <text:span text:style-name="T11">{</text:span> <text:span text:style-name="T14">..</text:span><text:span text:style-name="T11">.</text:span> <text:span text:style-name="T11">}</text:span></text:p>
      <text:p text:style-name="P29"><text:span text:style-name="Strong_20_Emphasis"><text:span text:style-name="T3">Dica de tiozão:</text:span></text:span><text:span text:style-name="T4"> escolhe nomes significativos. </text:span><text:span text:style-name="Source_20_Text"><text:span text:style-name="T6">MEU-PROGRAMA</text:span></text:span><text:span text:style-name="T4"> serve para testes, mas num projeto real usa algo como </text:span><text:span text:style-name="Source_20_Text"><text:span text:style-name="T6">CALC-FOLHA-PAGAMENTO</text:span></text:span><text:span text:style-name="T4"> ou </text:span><text:span text:style-name="Source_20_Text"><text:span text:style-name="T6">PROC-BATCH-FECHAMENTO</text:span></text:span><text:span text:style-name="T4">. Isso ajuda a documentar sozinho o que o código faz.</text:span></text:p>
      <text:p text:style-name="P5"/>
      <text:h text:style-name="P2" text:outline-level="3"><text:span text:style-name="T5">2. </text:span><text:span text:style-name="Source_20_Text"><text:span text:style-name="T7">ENVIRONMENT DIVISION.</text:span></text:span><text:span text:style-name="T5"> — Onde o programa mora</text:span></text:h>
      <text:p text:style-name="P17">cobol</text:p>
      <text:p text:style-name="P6"><text:span text:style-name="T9">ENVIRONMENT</text:span> <text:span text:style-name="T9">DIVISION</text:span><text:span text:style-name="T11">.</text:span></text:p>
      <text:p text:style-name="P27"><text:span text:style-name="T4">Aqui declaras </text:span><text:span text:style-name="Strong_20_Emphasis"><text:span text:style-name="T3">onde</text:span></text:span><text:span text:style-name="T4"> o teu programa vai correr e com que recursos externos se vai comunicar. É como o ficheiro </text:span><text:span text:style-name="Source_20_Text"><text:span text:style-name="T6">appsettings.json</text:span></text:span><text:span text:style-name="T4"> do .NET — especifica bases de dados, ficheiros, impressoras.<text:line-break/>Nas primeiras semanas, ela fica vazia, porque ainda vais trabalhar só com terminal. Mas quando começares a ler ficheiros </text:span><text:span text:style-name="Source_20_Text"><text:span text:style-name="T6">.txt</text:span></text:span><text:span text:style-name="T4"> e bases de dados, vais preenchê-la com as seções </text:span><text:span text:style-name="Source_20_Text"><text:span text:style-name="T6">CONFIGURATION SECTION</text:span></text:span><text:span text:style-name="T4"> e </text:span><text:span text:style-name="Source_20_Text"><text:span text:style-name="T6">INPUT-OUTPUT SECTION</text:span></text:span><text:span text:style-name="T4">.</text:span></text:p>
      <text:p text:style-name="P29"><text:span text:style-name="T4">Para já, deixa-a vazia mas respeita-a. Não podes omitir a </text:span><text:span text:style-name="Source_20_Text"><text:span text:style-name="T6">ENVIRONMENT DIVISION</text:span></text:span><text:span text:style-name="T4">. Ela faz parte do "esqueleto sagrado".</text:span></text:p>
      <text:p text:style-name="P5"/>
      <text:h text:style-name="P2" text:outline-level="3"><text:span text:style-name="T5">3. </text:span><text:span text:style-name="Source_20_Text"><text:span text:style-name="T7">DATA DIVISION.</text:span></text:span><text:span text:style-name="T5"> — A despensa das variáveis</text:span></text:h>
      <text:p text:style-name="P17">cobol</text:p>
      <text:p text:style-name="P6"><text:soft-page-break/><text:span text:style-name="T9">DATA</text:span> <text:span text:style-name="T9">DIVISION</text:span><text:span text:style-name="T11">.</text:span></text:p>
      <text:p text:style-name="P6"><text:span text:style-name="T9">WORKING-STORAGE</text:span> <text:span text:style-name="T9">SECTION</text:span><text:span text:style-name="T11">.</text:span></text:p>
      <text:p text:style-name="P21"><text:span text:style-name="T4">Aqui é o coração da organização do COBOL. Ao contrário do C# ou do Python, onde podes declarar variáveis em qualquer canto, no COBOL </text:span><text:span text:style-name="Strong_20_Emphasis"><text:span text:style-name="T3">todas as variáveis têm de ser declaradas aqui</text:span></text:span><text:span text:style-name="T4">, antes do código que as usa.</text:span></text:p>
      <text:p text:style-name="P11">Isto é incrível porque obriga-te a pensar na estrutura dos dados antes de escrever lógica. E, acredita, isso evita muita porcaria.</text:p>
      <text:list text:style-name="L1">
        <text:list-item>
          <text:p text:style-name="P23"><text:span text:style-name="Source_20_Text"><text:span text:style-name="T6">WORKING-STORAGE SECTION</text:span></text:span><text:span text:style-name="T4">: variáveis globais ao programa, que existem durante toda a execução.</text:span></text:p>
        </text:list-item>
        <text:list-item>
          <text:p text:style-name="P23"><text:span text:style-name="T4">Depois aprenderás </text:span><text:span text:style-name="Source_20_Text"><text:span text:style-name="T6">LINKAGE SECTION</text:span></text:span><text:span text:style-name="T4"> (para receber parâmetros) e </text:span><text:span text:style-name="Source_20_Text"><text:span text:style-name="T6">FILE SECTION</text:span></text:span><text:span text:style-name="T4"> (para descrever ficheiros).</text:span></text:p>
        </text:list-item>
      </text:list>
      <text:p text:style-name="P27"><text:span text:style-name="T4">Hoje ainda está vazia, mas amanhã vais enchê-la com </text:span><text:span text:style-name="Source_20_Text"><text:span text:style-name="T6">PIC</text:span></text:span><text:span text:style-name="T4"> (a declaração de tipos do COBOL). Aguenta a curiosidade.</text:span></text:p>
      <text:p text:style-name="P5"/>
      <text:h text:style-name="P2" text:outline-level="3"><text:span text:style-name="T5">4. </text:span><text:span text:style-name="Source_20_Text"><text:span text:style-name="T7">PROCEDURE DIVISION.</text:span></text:span><text:span text:style-name="T5"> — Onde a mágica acontece</text:span></text:h>
      <text:p text:style-name="P17">cobol</text:p>
      <text:p text:style-name="P6"><text:span text:style-name="T9">PROCEDURE</text:span> <text:span text:style-name="T9">DIVISION</text:span><text:span text:style-name="T11">.</text:span></text:p>
      <text:p text:style-name="P6">MAIN-PROCEDURE<text:span text:style-name="T11">.</text:span></text:p>
      <text:p text:style-name="P7"><text:s text:c="4"/><text:span text:style-name="T10">DISPLAY</text:span><text:span text:style-name="T8"> </text:span><text:span text:style-name="T16">"Estrutura gerada com sucesso!"</text:span><text:span text:style-name="T12">.</text:span></text:p>
      <text:p text:style-name="P7"><text:s text:c="4"/><text:span text:style-name="T10">STOP</text:span><text:span text:style-name="T8"> </text:span><text:span text:style-name="T10">RUN</text:span><text:span text:style-name="T12">.</text:span></text:p>
      <text:p text:style-name="P27"><text:span text:style-name="T4">Finalmente, o palco onde escreves os comandos. É equivalente ao </text:span><text:span text:style-name="Source_20_Text"><text:span text:style-name="T6">static void Main()</text:span></text:span><text:span text:style-name="T4"> do C#.</text:span></text:p>
      <text:list text:style-name="L2">
        <text:list-item>
          <text:p text:style-name="P24"><text:span text:style-name="Source_20_Text"><text:span text:style-name="T6">PROCEDURE DIVISION</text:span></text:span><text:span text:style-name="T4"> é a divisão em si.</text:span></text:p>
        </text:list-item>
        <text:list-item>
          <text:p text:style-name="P24"><text:span text:style-name="Source_20_Text"><text:span text:style-name="T6">MAIN-PROCEDURE.</text:span></text:span><text:span text:style-name="T4"> é um parágrafo. Podes criar quantos parágrafos quiseres (ex: </text:span><text:span text:style-name="Source_20_Text"><text:span text:style-name="T6">CALCULAR-IMPOSTOS.</text:span></text:span><text:span text:style-name="T4">, </text:span><text:span text:style-name="Source_20_Text"><text:span text:style-name="T6">LER-ARQUIVOS.</text:span></text:span><text:span text:style-name="T4">). Eles funcionam como "funções" simples (na verdade, sub-rotinas).</text:span></text:p>
        </text:list-item>
        <text:list-item>
          <text:p text:style-name="P24"><text:span text:style-name="Source_20_Text"><text:span text:style-name="T6">DISPLAY</text:span></text:span><text:span text:style-name="T4"> é o </text:span><text:span text:style-name="Source_20_Text"><text:span text:style-name="T6">Console.WriteLine</text:span></text:span><text:span text:style-name="T4"> do COBOL.</text:span></text:p>
        </text:list-item>
        <text:list-item>
          <text:p text:style-name="P24"><text:span text:style-name="Source_20_Text"><text:span text:style-name="T6">STOP RUN.</text:span></text:span><text:span text:style-name="T4"> encerra o programa. Sem ele, o programa pode continuar a executar coisas estranhas.</text:span></text:p>
        </text:list-item>
      </text:list>
      <text:p text:style-name="P29"><text:soft-page-break/><text:span text:style-name="Strong_20_Emphasis"><text:span text:style-name="T3">Atenção ao ponto final!</text:span></text:span><text:span text:style-name="T4"><text:line-break/>No COBOL, o ponto final </text:span><text:span text:style-name="Source_20_Text"><text:span text:style-name="T6">.</text:span></text:span><text:span text:style-name="T4"> encerra um comando ou um bloco. Em código moderno, usamos </text:span><text:span text:style-name="Source_20_Text"><text:span text:style-name="T6">END-IF</text:span></text:span><text:span text:style-name="T4">, </text:span><text:span text:style-name="Source_20_Text"><text:span text:style-name="T6">END-PERFORM</text:span></text:span><text:span text:style-name="T4"> e só colocamos o ponto no final dos parágrafos e no </text:span><text:span text:style-name="Source_20_Text"><text:span text:style-name="T6">STOP RUN.</text:span></text:span><text:span text:style-name="T4">. Esquece o ponto final dentro de </text:span><text:span text:style-name="Source_20_Text"><text:span text:style-name="T6">IF</text:span></text:span><text:span text:style-name="T4">s — é a causa número 1 de bugs em iniciantes.</text:span></text:p>
      <text:p text:style-name="P5"/>
      <text:h text:style-name="P1" text:outline-level="2">🧠 <text:span text:style-name="T1">Por que esta rigidez é uma vantagem (e não uma chatice)?</text:span></text:h>
      <text:p text:style-name="P11">Quando estiveres a processar 10 milhões de registos bancários às 3 da manhã, vais agradecer por cada variável estar declarada numa única região do código. A estrutura do COBOL é uma disciplina que te torna um programador mais organizado — e isso vale ouro nas consultorias de modernização.</text:p>
      <text:p text:style-name="P21"><text:span text:style-name="T4">Além disso, nas entrevistas, vão perguntar-te: </text:span><text:span text:style-name="Emphasis"><text:span text:style-name="T4">"Descreva a estrutura de um programa COBOL."</text:span></text:span><text:span text:style-name="T4"> E tu, com um sorriso nos lábios, responderás:</text:span></text:p>
      <text:p text:style-name="P14">"IDENTIFICATION para o nome, ENVIRONMENT para os recursos, DATA para as variáveis, PROCEDURE para a lógica. Ponto final."</text:p>
      <text:p text:style-name="P5"/>
      <text:h text:style-name="P1" text:outline-level="2">🧪 <text:span text:style-name="T1">Desafio do Dia 1</text:span></text:h>
      <text:p text:style-name="P27"><text:span text:style-name="T4">Para fixar, quero que cries um programa chamado </text:span><text:span text:style-name="Source_20_Text"><text:span text:style-name="T6">DIA1-ESTRUTURA.cob</text:span></text:span><text:span text:style-name="T4"> na pasta </text:span><text:span text:style-name="Source_20_Text"><text:span text:style-name="T6">month-1-fundamentos/week-1/day-01/</text:span></text:span><text:span text:style-name="T4"> e faças o seguinte:</text:span></text:p>
      <text:list text:style-name="L3">
        <text:list-item>
          <text:p text:style-name="P25"><text:span text:style-name="T4">Adiciona um comentário com o teu nome e a data de hoje (comentário em COBOL é </text:span><text:span text:style-name="Source_20_Text"><text:span text:style-name="T6">*&gt; texto</text:span></text:span><text:span text:style-name="T4">).</text:span></text:p>
        </text:list-item>
        <text:list-item>
          <text:p text:style-name="P26"><text:span text:style-name="T4">Declara três parágrafos dentro da </text:span><text:span text:style-name="Source_20_Text"><text:span text:style-name="T6">PROCEDURE DIVISION</text:span></text:span><text:span text:style-name="T4">:</text:span></text:p>
          <text:list>
            <text:list-item>
              <text:p text:style-name="P25"><text:span text:style-name="Source_20_Text"><text:span text:style-name="T6">SAUDACAO.</text:span></text:span><text:span text:style-name="T4"> que dá </text:span><text:span text:style-name="Source_20_Text"><text:span text:style-name="T6">DISPLAY "Ola, Antunes!"</text:span></text:span></text:p>
            </text:list-item>
            <text:list-item>
              <text:p text:style-name="P25"><text:span text:style-name="Source_20_Text"><text:span text:style-name="T6">DESPEDIDA.</text:span></text:span><text:span text:style-name="T4"> que dá </text:span><text:span text:style-name="Source_20_Text"><text:span text:style-name="T6">DISPLAY "Ate amanha!"</text:span></text:span></text:p>
            </text:list-item>
            <text:list-item>
              <text:p text:style-name="P25"><text:soft-page-break/><text:span text:style-name="Source_20_Text"><text:span text:style-name="T6">MAIN-PROCEDURE.</text:span></text:span><text:span text:style-name="T4"> que chama os dois parágrafos com </text:span><text:span text:style-name="Source_20_Text"><text:span text:style-name="T6">PERFORM SAUDACAO</text:span></text:span><text:span text:style-name="T4"> e </text:span><text:span text:style-name="Source_20_Text"><text:span text:style-name="T6">PERFORM DESPEDIDA</text:span></text:span><text:span text:style-name="T4">.</text:span></text:p>
            </text:list-item>
          </text:list>
        </text:list-item>
        <text:list-item>
          <text:p text:style-name="P10">Executa e vê a mágica a acontecer no terminal.</text:p>
        </text:list-item>
      </text:list>
      <text:p text:style-name="P27"><text:span text:style-name="T4">Depois faz commit e push para o teu repositório </text:span><text:span text:style-name="Source_20_Text"><text:span text:style-name="T6">cobol-journey</text:span></text:span><text:span text:style-name="T4">:</text:span></text:p>
      <text:p text:style-name="P17">bash</text:p>
      <text:p text:style-name="P6"><text:span text:style-name="T14">git</text:span> <text:span text:style-name="T14">add</text:span> <text:span text:style-name="T15">.</text:span></text:p>
      <text:p text:style-name="P6"><text:span text:style-name="T14">git</text:span> commit <text:span text:style-name="T14">-m</text:span> <text:span text:style-name="T15">"Dia 1: estrutura base e múltiplos parágrafos"</text:span></text:p>
      <text:p text:style-name="P6"><text:span text:style-name="T14">git</text:span> push</text:p>
      <text:p text:style-name="P27"><text:span text:style-name="T4">Amanhã, no </text:span><text:span text:style-name="Strong_20_Emphasis"><text:span text:style-name="T3">Dia 2</text:span></text:span><text:span text:style-name="T4">, abrimos a </text:span><text:span text:style-name="Source_20_Text"><text:span text:style-name="T6">WORKING-STORAGE</text:span></text:span><text:span text:style-name="T4"> e começamos a brincar com variáveis. Vais ver que o </text:span><text:span text:style-name="Source_20_Text"><text:span text:style-name="T6">PIC</text:span></text:span><text:span text:style-name="T4"> é um bicho estranho, mas domável.</text:span></text:p>
      <text:p text:style-name="P28"><text:span text:style-name="Strong_20_Emphasis"><text:span text:style-name="T3">Bora, gafanhoto! O mainframe não espera.</text:span></text:span><text:span text:style-name="T4"> 🚀Excelente, professor! Aceito o desafio. Vou criar o programa </text:span><text:span text:style-name="Source_20_Text"><text:span text:style-name="T6">DIA1-ESTRUTURA.cob</text:span></text:span><text:span text:style-name="T4"> conforme as instruções, testar no terminal e depois fazer o commit. Só uma dúvida: os parágrafos </text:span><text:span text:style-name="Source_20_Text"><text:span text:style-name="T6">SAUDACAO</text:span></text:span><text:span text:style-name="T4"> e </text:span><text:span text:style-name="Source_20_Text"><text:span text:style-name="T6">DESPEDIDA</text:span></text:span><text:span text:style-name="T4"> devem ser escritos exatamente como descreveu, ou posso personalizar as mensagens de saudação e despedida? Além disso, devo manter a </text:span><text:span text:style-name="Source_20_Text"><text:span text:style-name="T6">WORKING-STORAGE SECTION</text:span></text:span><text:span text:style-name="T4"> vazia por enquanto, certo? Aguardo a confirmação para iniciar os trabalhos.</text:span></text:p>
      <text:p text:style-name="P16">cara esta bom " *&gt; Antunes Jamba *&gt; Data 30/06/2026 IDENTIFICATION DIVISION. PROGRAM-ID. DIA1-ESTRUTURA. ENVIRONMENT DIVISION. DATA DIVISION. WORKING-STORAGE SECTION. PROCEDURE DIVISION. SAUDACAO. display "Ola Antunes". DESPEDIDA. display "Adeus, Antunes!" MAIN-PROCEDURE. perform SAUDACAO. perform DESPEDIDA. STOP RUN. "</text:p>
      <text:p text:style-name="P22"><text:span text:style-name="T4"/></text:p>
      <text:p text:style-name="P22"><text:span text:style-name="T4">Analisei o teu código, Antunes. Está quase perfeito, mas um veterano de mainframe nota logo dois ou três detalhes que separam um código funcional de um código impecável. Como prometi ser o teu Guanabara do COBOL, vamos corrigir com carinho e entender o </text:span><text:span text:style-name="Strong_20_Emphasis"><text:span text:style-name="T3">porquê</text:span></text:span><text:span text:style-name="T4">.</text:span></text:p>
      <text:h text:style-name="P3" text:outline-level="3">✅ <text:span text:style-name="T2">O que está impecável</text:span></text:h>
      <text:list text:style-name="L4">
        <text:list-item>
          <text:p text:style-name="P30"><text:span text:style-name="Strong_20_Emphasis"><text:span text:style-name="T3">Comentários iniciais (</text:span></text:span><text:span text:style-name="Strong_20_Emphasis"><text:span text:style-name="Source_20_Text"><text:span text:style-name="T6">*&gt;</text:span></text:span></text:span><text:span text:style-name="Strong_20_Emphasis"><text:span text:style-name="T3">)</text:span></text:span><text:span text:style-name="T4">: Perfeito. É assim que se faz documentação </text:span><text:span text:style-name="Emphasis"><text:span text:style-name="T4">in-code</text:span></text:span><text:span text:style-name="T4"> no COBOL moderno.</text:span></text:p>
        </text:list-item>
        <text:list-item>
          <text:p text:style-name="P30"><text:soft-page-break/><text:span text:style-name="Strong_20_Emphasis"><text:span text:style-name="T3">Estrutura das 4 Divisões</text:span></text:span><text:span text:style-name="T4">: Estão na ordem correta. A </text:span><text:span text:style-name="Source_20_Text"><text:span text:style-name="T6">ENVIRONMENT</text:span></text:span><text:span text:style-name="T4"> e a </text:span><text:span text:style-name="Source_20_Text"><text:span text:style-name="T6">WORKING-STORAGE</text:span></text:span><text:span text:style-name="T4"> vazias são exatamente o que eu esperava para o Dia 1.</text:span></text:p>
        </text:list-item>
        <text:list-item>
          <text:p text:style-name="P30"><text:span text:style-name="Strong_20_Emphasis"><text:span text:style-name="T3">Uso do </text:span></text:span><text:span text:style-name="Strong_20_Emphasis"><text:span text:style-name="Source_20_Text"><text:span text:style-name="T6">PERFORM</text:span></text:span></text:span><text:span text:style-name="T4">: A lógica de chamar os parágrafos está correta.</text:span></text:p>
        </text:list-item>
        <text:list-item>
          <text:p text:style-name="P30"><text:span text:style-name="Strong_20_Emphasis"><text:span text:style-name="T3">Nomes de parágrafos</text:span></text:span><text:span text:style-name="T4">: </text:span><text:span text:style-name="Source_20_Text"><text:span text:style-name="T6">SAUDACAO</text:span></text:span><text:span text:style-name="T4"> e </text:span><text:span text:style-name="Source_20_Text"><text:span text:style-name="T6">DESPEDIDA</text:span></text:span><text:span text:style-name="T4"> são claros e legíveis.</text:span></text:p>
        </text:list-item>
      </text:list>
      <text:h text:style-name="P3" text:outline-level="3">⚠️ <text:span text:style-name="T2">Pontos de Atenção (A chama do detalhe)</text:span></text:h>
      <text:p text:style-name="P11">Temos 3 erros clássicos de quem está a começar. Corrigi-los agora vai evitar dores de cabeça gigantescas quando tiveres centenas de linhas.</text:p>
      <text:p text:style-name="P27"><text:span text:style-name="Strong_20_Emphasis"><text:span text:style-name="T3">1. O Ponto Final </text:span></text:span><text:span text:style-name="Strong_20_Emphasis"><text:span text:style-name="Source_20_Text"><text:span text:style-name="T6">.</text:span></text:span></text:span><text:span text:style-name="Strong_20_Emphasis"><text:span text:style-name="T3"> — O Vilão Silencioso</text:span></text:span><text:span text:style-name="T4"><text:line-break/>No teu código:</text:span></text:p>
      <text:p text:style-name="P17">cobol</text:p>
      <text:p text:style-name="P6">SAUDACAO<text:span text:style-name="T11">.</text:span></text:p>
      <text:p text:style-name="P7"><text:s text:c="7"/><text:span text:style-name="T10">display</text:span><text:span text:style-name="T8"> </text:span><text:span text:style-name="T16">"Ola Antunes"</text:span><text:span text:style-name="T12">.</text:span></text:p>
      <text:p text:style-name="P7"><text:s/><text:span text:style-name="T8">DESPEDIDA</text:span><text:span text:style-name="T12">.</text:span></text:p>
      <text:p text:style-name="P7"><text:s text:c="7"/><text:span text:style-name="T10">display</text:span><text:span text:style-name="T8"> </text:span><text:span text:style-name="T16">"Adeus, Antunes!"</text:span></text:p>
      <text:list text:style-name="L5">
        <text:list-item>
          <text:p text:style-name="P31"><text:span text:style-name="T4">Repara que em </text:span><text:span text:style-name="Source_20_Text"><text:span text:style-name="T6">display "Ola Antunes".</text:span></text:span><text:span text:style-name="T4"> tu colocaste um ponto final.</text:span></text:p>
        </text:list-item>
        <text:list-item>
          <text:p text:style-name="P31"><text:span text:style-name="T4">Em </text:span><text:span text:style-name="Source_20_Text"><text:span text:style-name="T6">display "Adeus, Antunes!"</text:span></text:span><text:span text:style-name="T4"> não tem ponto final, mas a exclamação </text:span><text:span text:style-name="Source_20_Text"><text:span text:style-name="T6">!</text:span></text:span><text:span text:style-name="T4"> não é um ponto.</text:span></text:p>
        </text:list-item>
      </text:list>
      <text:p text:style-name="P27"><text:span text:style-name="Strong_20_Emphasis"><text:span text:style-name="T3">O problema</text:span></text:span><text:span text:style-name="T4">: No COBOL, o ponto final </text:span><text:span text:style-name="Source_20_Text"><text:span text:style-name="T6">.</text:span></text:span><text:span text:style-name="T4"> encerra </text:span><text:span text:style-name="Strong_20_Emphasis"><text:span text:style-name="T3">todo o comando</text:span></text:span><text:span text:style-name="T4">. Ao colocar o ponto no </text:span><text:span text:style-name="Source_20_Text"><text:span text:style-name="T6">display</text:span></text:span><text:span text:style-name="T4"> da </text:span><text:span text:style-name="Source_20_Text"><text:span text:style-name="T6">SAUDACAO</text:span></text:span><text:span text:style-name="T4">, estás a dizer ao compilador que o parágrafo </text:span><text:span text:style-name="Source_20_Text"><text:span text:style-name="T6">SAUDACAO</text:span></text:span><text:span text:style-name="T4"> terminou ali, mas o compilador pode achar que </text:span><text:span text:style-name="Source_20_Text"><text:span text:style-name="T6">DESPEDIDA</text:span></text:span><text:span text:style-name="T4"> ainda faz parte da </text:span><text:span text:style-name="Source_20_Text"><text:span text:style-name="T6">SAUDACAO</text:span></text:span><text:span text:style-name="T4"> ou gerar um erro de fluxo. Além disso, se não colocares o ponto final após o </text:span><text:span text:style-name="Source_20_Text"><text:span text:style-name="T6">STOP RUN</text:span></text:span><text:span text:style-name="T4"> ou no final do parágrafo, o código não compila.</text:span></text:p>
      <text:p text:style-name="P21"><text:span text:style-name="Strong_20_Emphasis"><text:span text:style-name="T3">A regra de ouro no teu Linux Mint (Formato Livre):</text:span></text:span></text:p>
      <text:list text:style-name="L6">
        <text:list-item>
          <text:p text:style-name="P32"><text:span text:style-name="Strong_20_Emphasis"><text:span text:style-name="T3">Nunca</text:span></text:span><text:span text:style-name="T4"> uses ponto final dentro de um parágrafo no meio de comandos </text:span><text:span text:style-name="Source_20_Text"><text:span text:style-name="T6">DISPLAY</text:span></text:span><text:span text:style-name="T4">, </text:span><text:span text:style-name="Source_20_Text"><text:span text:style-name="T6">MOVE</text:span></text:span><text:span text:style-name="T4">, etc.</text:span></text:p>
        </text:list-item>
        <text:list-item>
          <text:p text:style-name="P32"><text:span text:style-name="T4">Usa o ponto final </text:span><text:span text:style-name="Strong_20_Emphasis"><text:span text:style-name="T3">apenas</text:span></text:span><text:span text:style-name="T4"> no final do nome do parágrafo e no último comando do parágrafo (ex: </text:span><text:span text:style-name="Source_20_Text"><text:span text:style-name="T6">STOP RUN.</text:span></text:span><text:span text:style-name="T4">).</text:span></text:p>
        </text:list-item>
      </text:list>
      <text:p text:style-name="P27"><text:span text:style-name="Strong_20_Emphasis"><text:span text:style-name="T3">2. O </text:span></text:span><text:span text:style-name="Strong_20_Emphasis"><text:span text:style-name="Source_20_Text"><text:span text:style-name="T6">DISPLAY</text:span></text:span></text:span><text:span text:style-name="Strong_20_Emphasis"><text:span text:style-name="T3"> está "colado" na esquerda</text:span></text:span><text:span text:style-name="T4"><text:line-break/>No teu código:</text:span></text:p>
      <text:p text:style-name="P17">cobol</text:p>
      <text:p text:style-name="P6"><text:span text:style-name="T9">display</text:span> <text:span text:style-name="T15">"Ola Antunes"</text:span><text:span text:style-name="T11">.</text:span></text:p>
      <text:p text:style-name="P27"><text:soft-page-break/><text:span text:style-name="T4">Embora no formato livre compile, a legibilidade é horrível. O COBOL tradicional (e o olho humano) pede que os comandos dentro da </text:span><text:span text:style-name="Source_20_Text"><text:span text:style-name="T6">PROCEDURE DIVISION</text:span></text:span><text:span text:style-name="T4"> estejam indentados (recuados) na </text:span><text:span text:style-name="Strong_20_Emphasis"><text:span text:style-name="T3">Área B</text:span></text:span><text:span text:style-name="T4"> (colunas 12-72). No VS Code, usa sempre pelo menos 4 espaços antes de qualquer comando. Assim, qualquer pessoa sabe que aquilo é um comando executável e não um nome de parágrafo.</text:span></text:p>
      <text:p text:style-name="P27"><text:span text:style-name="Strong_20_Emphasis"><text:span text:style-name="T3">3. A Ordem dos Parágrafos</text:span></text:span><text:span text:style-name="T4"><text:line-break/>O fluxo do programa começa no </text:span><text:span text:style-name="Strong_20_Emphasis"><text:span text:style-name="T3">primeiro parágrafo da </text:span></text:span><text:span text:style-name="Strong_20_Emphasis"><text:span text:style-name="Source_20_Text"><text:span text:style-name="T6">PROCEDURE DIVISION</text:span></text:span></text:span><text:span text:style-name="T4">. No teu caso, a </text:span><text:span text:style-name="Source_20_Text"><text:span text:style-name="T6">SAUDACAO</text:span></text:span><text:span text:style-name="T4"> está em primeiro lugar. Se não usasses o </text:span><text:span text:style-name="Source_20_Text"><text:span text:style-name="T6">PERFORM</text:span></text:span><text:span text:style-name="T4"> na </text:span><text:span text:style-name="Source_20_Text"><text:span text:style-name="T6">MAIN-PROCEDURE</text:span></text:span><text:span text:style-name="T4">, o programa começaria por executar a </text:span><text:span text:style-name="Source_20_Text"><text:span text:style-name="T6">SAUDACAO</text:span></text:span><text:span text:style-name="T4"> sem tu quereres.<text:line-break/>Para manteres um controlo absoluto, o </text:span><text:span text:style-name="Source_20_Text"><text:span text:style-name="T6">MAIN-PROCEDURE.</text:span></text:span><text:span text:style-name="T4"> (ou </text:span><text:span text:style-name="Source_20_Text"><text:span text:style-name="T6">MAIN.</text:span></text:span><text:span text:style-name="T4">) deve ser </text:span><text:span text:style-name="Strong_20_Emphasis"><text:span text:style-name="T3">sempre</text:span></text:span><text:span text:style-name="T4"> o primeiro parágrafo. Os outros vêm depois.</text:span></text:p>
      <text:p text:style-name="P5"/>
      <text:h text:style-name="P3" text:outline-level="3">🔧 <text:span text:style-name="T2">Código Corrigido (Versão de Ouro)</text:span></text:h>
      <text:p text:style-name="P17">cobol</text:p>
      <text:p text:style-name="P8">*&gt; Antunes Jamba</text:p>
      <text:p text:style-name="P8">*&gt; Data 30/06/2026</text:p>
      <text:p text:style-name="P6"><text:span text:style-name="T9">IDENTIFICATION</text:span> <text:span text:style-name="T9">DIVISION</text:span><text:span text:style-name="T11">.</text:span></text:p>
      <text:p text:style-name="P6"><text:span text:style-name="T9">PROGRAM-ID</text:span><text:span text:style-name="T11">.</text:span> DIA1-ESTRUTURA<text:span text:style-name="T11">.</text:span></text:p>
      <text:p text:style-name="P9"/>
      <text:p text:style-name="P6"><text:span text:style-name="T9">ENVIRONMENT</text:span> <text:span text:style-name="T9">DIVISION</text:span><text:span text:style-name="T11">.</text:span></text:p>
      <text:p text:style-name="P9"/>
      <text:p text:style-name="P6"><text:span text:style-name="T9">DATA</text:span> <text:span text:style-name="T9">DIVISION</text:span><text:span text:style-name="T11">.</text:span></text:p>
      <text:p text:style-name="P6"><text:span text:style-name="T9">WORKING-STORAGE</text:span> <text:span text:style-name="T9">SECTION</text:span><text:span text:style-name="T11">.</text:span></text:p>
      <text:p text:style-name="P9"/>
      <text:p text:style-name="P6"><text:span text:style-name="T9">PROCEDURE</text:span> <text:span text:style-name="T9">DIVISION</text:span><text:span text:style-name="T11">.</text:span></text:p>
      <text:p text:style-name="P9"/>
      <text:p text:style-name="P6">MAIN-PROCEDURE<text:span text:style-name="T11">.</text:span></text:p>
      <text:p text:style-name="P7"><text:s text:c="4"/><text:span text:style-name="T10">PERFORM</text:span><text:span text:style-name="T8"> SAUDACAO</text:span></text:p>
      <text:p text:style-name="P7"><text:s text:c="4"/><text:span text:style-name="T10">PERFORM</text:span><text:span text:style-name="T8"> DESPEDIDA</text:span></text:p>
      <text:p text:style-name="P7"><text:s text:c="4"/><text:span text:style-name="T10">STOP</text:span><text:span text:style-name="T8"> </text:span><text:span text:style-name="T10">RUN</text:span><text:span text:style-name="T12">.</text:span></text:p>
      <text:p text:style-name="P9"/>
      <text:p text:style-name="P6">SAUDACAO<text:span text:style-name="T11">.</text:span></text:p>
      <text:p text:style-name="P7"><text:s text:c="4"/><text:span text:style-name="T10">DISPLAY</text:span><text:span text:style-name="T8"> </text:span><text:span text:style-name="T16">"Ola Antunes!"</text:span><text:span text:style-name="T12">.</text:span></text:p>
      <text:p text:style-name="P9"/>
      <text:p text:style-name="P6">DESPEDIDA<text:span text:style-name="T11">.</text:span></text:p>
      <text:p text:style-name="P7"><text:soft-page-break/><text:s text:c="4"/><text:span text:style-name="T10">DISPLAY</text:span><text:span text:style-name="T8"> </text:span><text:span text:style-name="T16">"Adeus, Antunes!"</text:span><text:span text:style-name="T12">.</text:span></text:p>
      <text:p text:style-name="P21"><text:span text:style-name="Strong_20_Emphasis"><text:span text:style-name="T3">Repara nas diferenças:</text:span></text:span></text:p>
      <text:list text:style-name="L7">
        <text:list-item>
          <text:p text:style-name="P33"><text:span text:style-name="T4">O </text:span><text:span text:style-name="Source_20_Text"><text:span text:style-name="T6">MAIN-PROCEDURE</text:span></text:span><text:span text:style-name="T4"> é o primeiro parágrafo. É ele quem manda.</text:span></text:p>
        </text:list-item>
        <text:list-item>
          <text:p text:style-name="P33"><text:span text:style-name="T4">Tirei o ponto final do meio do código. Agora, só usamos </text:span><text:span text:style-name="Source_20_Text"><text:span text:style-name="T6">.</text:span></text:span><text:span text:style-name="T4"> nos nomes dos parágrafos (</text:span><text:span text:style-name="Source_20_Text"><text:span text:style-name="T6">MAIN-PROCEDURE.</text:span></text:span><text:span text:style-name="T4">, </text:span><text:span text:style-name="Source_20_Text"><text:span text:style-name="T6">SAUDACAO.</text:span></text:span><text:span text:style-name="T4">) e no final do </text:span><text:span text:style-name="Source_20_Text"><text:span text:style-name="T6">STOP RUN.</text:span></text:span><text:span text:style-name="T4">.</text:span></text:p>
        </text:list-item>
        <text:list-item>
          <text:p text:style-name="P33"><text:span text:style-name="T4">Indentei os comandos </text:span><text:span text:style-name="Source_20_Text"><text:span text:style-name="T6">DISPLAY</text:span></text:span><text:span text:style-name="T4"> e </text:span><text:span text:style-name="Source_20_Text"><text:span text:style-name="T6">PERFORM</text:span></text:span><text:span text:style-name="T4"> com 4 espaços. Ficou muito mais fácil de ler.</text:span></text:p>
        </text:list-item>
        <text:list-item>
          <text:p text:style-name="P33"><text:span text:style-name="T4">Coloquei o </text:span><text:span text:style-name="Source_20_Text"><text:span text:style-name="T6">STOP RUN.</text:span></text:span><text:span text:style-name="T4"> com ponto final no final da </text:span><text:span text:style-name="Source_20_Text"><text:span text:style-name="T6">MAIN-PROCEDURE</text:span></text:span><text:span text:style-name="T4">.</text:span></text:p>
        </text:list-item>
      </text:list>
      <text:h text:style-name="P3" text:outline-level="3">🚀 <text:span text:style-name="T2">Para o GitHub</text:span></text:h>
      <text:p text:style-name="P11">Corrige o ficheiro no VS Code e roda o comando mágico:</text:p>
      <text:p text:style-name="P17">bash</text:p>
      <text:p text:style-name="P6"><text:span text:style-name="T14">git</text:span> <text:span text:style-name="T14">add</text:span> <text:span text:style-name="T15">.</text:span></text:p>
      <text:p text:style-name="P6"><text:span text:style-name="T14">git</text:span> commit <text:span text:style-name="T14">-m</text:span> <text:span text:style-name="T15">"Dia 1: Estrutura base - correcao dos pontos finais e indentacao"</text:span></text:p>
      <text:p text:style-name="P6"><text:span text:style-name="T14">git</text:span> push</text:p>
      <text:p text:style-name="P28"><text:span text:style-name="T4">Estás oficialmente no jogo, gafanhoto! Errar e corrigir no primeiro dia é o melhor sinal de que a aprendizagem é real. Amanhã, no Dia 2, vamos abrir a </text:span><text:span text:style-name="Source_20_Text"><text:span text:style-name="T6">WORKING-STORAGE SECTION</text:span></text:span><text:span text:style-name="T4"> e dar vida às variáveis com o místico </text:span><text:span text:style-name="Source_20_Text"><text:span text:style-name="T6">PIC</text:span></text:span><text:span text:style-name="T4">. Prepara o cérebro! 💾</text:span></text:p>
      <text:p text:style-name="P16">entendi agora é possivel colocar um p+aragrafo dentro de utro?</text:p>
      <text:p text:style-name="P12">Ótima pergunta, Antunes! Essa dúvida é clássica. Vamos esclarecer.</text:p>
      <text:p text:style-name="P27"><text:span text:style-name="T4">A resposta curta é: </text:span><text:span text:style-name="Strong_20_Emphasis"><text:span text:style-name="T3">não</text:span></text:span><text:span text:style-name="T4">, no COBOL não podes definir um parágrafo dentro de outro. Os parágrafos são como "títulos" independentes, sempre no nível mais alto da </text:span><text:span text:style-name="Source_20_Text"><text:span text:style-name="T6">PROCEDURE DIVISION</text:span></text:span><text:span text:style-name="T4">. Não há aninhamento sintático (não se pode abrir chaves {} dentro de um parágrafo para criar outro).</text:span></text:p>
      <text:p text:style-name="P27"><text:span text:style-name="T4">Mas calma: </text:span><text:span text:style-name="Strong_20_Emphasis"><text:span text:style-name="T3">podes chamar um parágrafo a partir de outro</text:span></text:span><text:span text:style-name="T4"> usando o </text:span><text:span text:style-name="Source_20_Text"><text:span text:style-name="T6">PERFORM</text:span></text:span><text:span text:style-name="T4">. Isso dá-te o efeito prático de “executar um bloco dentro de outro”, mantendo a estrutura organizada. Foi exatamente o que fizeste na aula anterior: o </text:span><text:span text:style-name="Source_20_Text"><text:span text:style-name="T6">MAIN-PROCEDURE</text:span></text:span><text:span text:style-name="T4"> mandou executar </text:span><text:span text:style-name="Source_20_Text"><text:span text:style-name="T6">SAUDACAO</text:span></text:span><text:span text:style-name="T4"> e </text:span><text:span text:style-name="Source_20_Text"><text:span text:style-name="T6">DESPEDIDA</text:span></text:span><text:span text:style-name="T4">.</text:span></text:p>
      <text:p text:style-name="P5"/>
      <text:h text:style-name="P4" text:outline-level="3"><text:soft-page-break/>Exemplo prático: um parágrafo que chama outro</text:h>
      <text:p text:style-name="P17">cobol</text:p>
      <text:p text:style-name="P6"><text:span text:style-name="T9">PROCEDURE</text:span> <text:span text:style-name="T9">DIVISION</text:span><text:span text:style-name="T11">.</text:span></text:p>
      <text:p text:style-name="P9"/>
      <text:p text:style-name="P6">MAIN-PROCEDURE<text:span text:style-name="T11">.</text:span></text:p>
      <text:p text:style-name="P7"><text:s text:c="4"/><text:span text:style-name="T10">DISPLAY</text:span><text:span text:style-name="T8"> </text:span><text:span text:style-name="T16">"Inicio do programa"</text:span></text:p>
      <text:p text:style-name="P7"><text:s text:c="4"/><text:span text:style-name="T10">PERFORM</text:span><text:span text:style-name="T8"> SAUDACAO</text:span></text:p>
      <text:p text:style-name="P7"><text:s text:c="4"/><text:span text:style-name="T10">PERFORM</text:span><text:span text:style-name="T8"> DESPEDIDA</text:span></text:p>
      <text:p text:style-name="P7"><text:s text:c="4"/><text:span text:style-name="T10">STOP</text:span><text:span text:style-name="T8"> </text:span><text:span text:style-name="T10">RUN</text:span><text:span text:style-name="T12">.</text:span></text:p>
      <text:p text:style-name="P9"/>
      <text:p text:style-name="P6">SAUDACAO<text:span text:style-name="T11">.</text:span></text:p>
      <text:p text:style-name="P7"><text:s text:c="4"/><text:span text:style-name="T10">DISPLAY</text:span><text:span text:style-name="T8"> </text:span><text:span text:style-name="T16">"Ola, Antunes!"</text:span></text:p>
      <text:p text:style-name="P7"><text:s text:c="4"/><text:span text:style-name="T10">PERFORM</text:span><text:span text:style-name="T8"> MOSTRAR-DATA</text:span><text:span text:style-name="T12">.</text:span><text:span text:style-name="T8"> <text:s text:c="2"/></text:span><text:span text:style-name="T17">*&gt; &lt;-- Um parágrafo a chamar outro</text:span></text:p>
      <text:p text:style-name="P9"/>
      <text:p text:style-name="P6">MOSTRAR-DATA<text:span text:style-name="T11">.</text:span></text:p>
      <text:p text:style-name="P7"><text:s text:c="4"/><text:span text:style-name="T10">DISPLAY</text:span><text:span text:style-name="T8"> </text:span><text:span text:style-name="T16">"Hoje e 30/06/2026"</text:span><text:span text:style-name="T12">.</text:span></text:p>
      <text:p text:style-name="P9"/>
      <text:p text:style-name="P6">DESPEDIDA<text:span text:style-name="T11">.</text:span></text:p>
      <text:p text:style-name="P7"><text:s text:c="4"/><text:span text:style-name="T10">DISPLAY</text:span><text:span text:style-name="T8"> </text:span><text:span text:style-name="T16">"Adeus!"</text:span><text:span text:style-name="T12">.</text:span></text:p>
      <text:p text:style-name="P27"><text:span text:style-name="Strong_20_Emphasis"><text:span text:style-name="T3">Fluxo:</text:span></text:span><text:span text:style-name="T4"><text:line-break/></text:span><text:span text:style-name="Source_20_Text"><text:span text:style-name="T6">MAIN-PROCEDURE</text:span></text:span><text:span text:style-name="T4"> → chama </text:span><text:span text:style-name="Source_20_Text"><text:span text:style-name="T6">SAUDACAO</text:span></text:span><text:span text:style-name="T4"> → dentro de </text:span><text:span text:style-name="Source_20_Text"><text:span text:style-name="T6">SAUDACAO</text:span></text:span><text:span text:style-name="T4"> chama </text:span><text:span text:style-name="Source_20_Text"><text:span text:style-name="T6">MOSTRAR-DATA</text:span></text:span><text:span text:style-name="T4"> → depois volta para </text:span><text:span text:style-name="Source_20_Text"><text:span text:style-name="T6">MAIN-PROCEDURE</text:span></text:span><text:span text:style-name="T4"> e chama </text:span><text:span text:style-name="Source_20_Text"><text:span text:style-name="T6">DESPEDIDA</text:span></text:span><text:span text:style-name="T4">.</text:span></text:p>
      <text:p text:style-name="P5"/>
      <text:h text:style-name="P4" text:outline-level="3">Por que isso é assim?</text:h>
      <text:p text:style-name="P27"><text:span text:style-name="T4">O COBOL foi pensado como um documento com secções planas. Os parágrafos são simplesmente “etiquetas” que o fluxo do programa pode visitar.<text:line-break/>Não existem hierarquias como funções dentro de funções (como no Python ou C#).<text:line-break/>A organização é </text:span><text:span text:style-name="Strong_20_Emphasis"><text:span text:style-name="T3">plana</text:span></text:span><text:span text:style-name="T4">, mas o </text:span><text:span text:style-name="Source_20_Text"><text:span text:style-name="T6">PERFORM</text:span></text:span><text:span text:style-name="T4"> permite reutilizar código quantas vezes quiseres — inclusive de dentro de outro parágrafo.</text:span></text:p>
      <text:p text:style-name="P5"/>
      <text:h text:style-name="P4" text:outline-level="3"><text:soft-page-break/>Dica do Guanabara do Mainframe 🧓</text:h>
      <text:p text:style-name="P27"><text:span text:style-name="T4">Pensa nos parágrafos como </text:span><text:span text:style-name="Strong_20_Emphasis"><text:span text:style-name="T3">gavetas independentes</text:span></text:span><text:span text:style-name="T4"> de um armário.<text:line-break/>Cada gaveta tem uma etiqueta. Tu não podes enfiar uma gaveta dentro da outra, mas podes </text:span><text:span text:style-name="Strong_20_Emphasis"><text:span text:style-name="T3">abrir</text:span></text:span><text:span text:style-name="T4"> uma gaveta (com </text:span><text:span text:style-name="Source_20_Text"><text:span text:style-name="T6">PERFORM</text:span></text:span><text:span text:style-name="T4">) enquanto estás a trabalhar noutra. Quando o </text:span><text:span text:style-name="Source_20_Text"><text:span text:style-name="T6">PERFORM</text:span></text:span><text:span text:style-name="T4"> termina, voltas exatamente para a linha seguinte de onde paraste.</text:span></text:p>
      <text:p text:style-name="P27"><text:span text:style-name="T4">No nosso plano de 5 meses, vais aprender a passar parâmetros entre parágrafos (com </text:span><text:span text:style-name="Source_20_Text"><text:span text:style-name="T6">USING</text:span></text:span><text:span text:style-name="T4"> e </text:span><text:span text:style-name="Source_20_Text"><text:span text:style-name="T6">LINKAGE SECTION</text:span></text:span><text:span text:style-name="T4">), o que os torna ainda mais parecidos com funções — mas sempre mantendo essa estrutura plana e segura.</text:span></text:p>
      <text:p text:style-name="P27"><text:span text:style-name="T4">Agora, para fixar, faz um pequeno exercício no teu </text:span><text:span text:style-name="Source_20_Text"><text:span text:style-name="T6">DIA1-ESTRUTURA.cob</text:span></text:span><text:span text:style-name="T4">:</text:span></text:p>
      <text:list text:style-name="L9">
        <text:list-item>
          <text:p text:style-name="P34"><text:span text:style-name="T4">Cria um novo parágrafo chamado </text:span><text:span text:style-name="Source_20_Text"><text:span text:style-name="T6">EXTRAS</text:span></text:span><text:span text:style-name="T4">.</text:span></text:p>
        </text:list-item>
        <text:list-item>
          <text:p text:style-name="P34"><text:span text:style-name="T4">Dentro dele, chama os parágrafos </text:span><text:span text:style-name="Source_20_Text"><text:span text:style-name="T6">SAUDACAO</text:span></text:span><text:span text:style-name="T4"> e </text:span><text:span text:style-name="Source_20_Text"><text:span text:style-name="T6">DESPEDIDA</text:span></text:span><text:span text:style-name="T4"> novamente.</text:span></text:p>
        </text:list-item>
        <text:list-item>
          <text:p text:style-name="P34"><text:span text:style-name="T4">No </text:span><text:span text:style-name="Source_20_Text"><text:span text:style-name="T6">MAIN-PROCEDURE</text:span></text:span><text:span text:style-name="T4">, depois do </text:span><text:span text:style-name="Source_20_Text"><text:span text:style-name="T6">PERFORM DESPEDIDA</text:span></text:span><text:span text:style-name="T4">, acrescenta um </text:span><text:span text:style-name="Source_20_Text"><text:span text:style-name="T6">PERFORM EXTRAS</text:span></text:span><text:span text:style-name="T4">.</text:span></text:p>
        </text:list-item>
        <text:list-item>
          <text:p text:style-name="P15">Executa e vê a bagunça organizada que criaste!</text:p>
        </text:list-item>
      </text:list>
      <text:p text:style-name="P13">Depois commit e push. Qualquer erro, mostra-me o código que eu corrijo. Amanhã, as variáveis atacam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30T15:53:23.615147669</meta:creation-date>
    <dc:date>2026-06-30T16:23:07.458683234</dc:date>
    <meta:editing-duration>PT29M4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0" meta:paragraph-count="147" meta:word-count="2004" meta:character-count="12375" meta:non-whitespace-character-count="10455"/>
  </office:meta>
</office:document-meta>
</file>