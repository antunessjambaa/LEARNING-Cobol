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2167in"/>
    </style:style>
    <style:style style:name="Table1.B" style:family="table-column">
      <style:table-column-properties style:column-width="1.1514in"/>
    </style:style>
    <style:style style:name="Table1.C" style:family="table-column">
      <style:table-column-properties style:column-width="1.4056in"/>
    </style:style>
    <style:style style:name="Table1.D" style:family="table-column">
      <style:table-column-properties style:column-width="3.1514in"/>
    </style:style>
    <style:style style:name="Table1.A1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000000"/>
    </style:style>
    <style:style style:name="Table1.A2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000000"/>
    </style:style>
    <style:style style:name="Table2" style:family="table">
      <style:table-properties style:width="6.1875in" table:align="left"/>
    </style:style>
    <style:style style:name="Table2.A" style:family="table-column">
      <style:table-column-properties style:column-width="1.3681in"/>
    </style:style>
    <style:style style:name="Table2.B" style:family="table-column">
      <style:table-column-properties style:column-width="2.2479in"/>
    </style:style>
    <style:style style:name="Table2.C" style:family="table-column">
      <style:table-column-properties style:column-width="2.5715in"/>
    </style:style>
    <style:style style:name="Table2.A1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000000"/>
    </style:style>
    <style:style style:name="Table2.A2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000000"/>
    </style:style>
    <style:style style:name="P1" style:family="paragraph" style:parent-style-name="Heading_20_2">
      <style:paragraph-properties fo:margin-left="0in" fo:margin-right="0in" fo:margin-top="0.3335in" fo:margin-bottom="0.1665in" style:contextual-spacing="false" style:line-height-at-least="0.3335in" fo:orphans="2" fo:widows="2" fo:text-indent="0in" style:auto-text-indent="false"/>
      <style:text-properties fo:font-variant="normal" fo:text-transform="none" fo:color="#0f1115" loext:opacity="100%" fo:letter-spacing="normal"/>
    </style:style>
    <style:style style:name="P2" style:family="paragraph" style:parent-style-name="Heading_20_2">
      <style:text-properties fo:font-variant="normal" fo:text-transform="none" fo:color="#0f1115" loext:opacity="100%" fo:letter-spacing="normal"/>
    </style:style>
    <style:style style:name="P3" style:family="paragraph" style:parent-style-name="Heading_20_2">
      <style:paragraph-properties fo:margin-left="0in" fo:margin-right="0in" fo:margin-top="0.3335in" fo:margin-bottom="0.1665in" style:contextual-spacing="false" style:line-height-at-least="0.3335in" fo:orphans="2" fo:widows="2" fo:text-indent="0in" style:auto-text-indent="false"/>
    </style:style>
    <style:style style:name="P4" style:family="paragraph" style:parent-style-name="Heading_20_3">
      <style:paragraph-properties fo:margin-left="0in" fo:margin-right="0in" fo:margin-top="0.3335in" fo:margin-bottom="0.1665in" style:contextual-spacing="false" style:line-height-at-least="0.3126in" fo:orphans="2" fo:widows="2" fo:text-indent="0in" style:auto-text-indent="false"/>
    </style:style>
    <style:style style:name="P5" style:family="paragraph" style:parent-style-name="Heading_20_3">
      <style:paragraph-properties fo:margin-left="0in" fo:margin-right="0in" fo:margin-top="0.3335in" fo:margin-bottom="0.1665in" style:contextual-spacing="false" style:line-height-at-least="0.3126in" fo:orphans="2" fo:widows="2" fo:text-indent="0in" style:auto-text-indent="false"/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style:font-name="Menlo" fo:font-size="9.75pt" fo:font-style="normal" fo:font-weight="normal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fo:color="#a0a1a7" loext:opacity="100%" style:font-name="Menlo" fo:font-size="9.75pt" fo:font-style="italic" fo:font-weight="normal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/>
    </style:style>
    <style:style style:name="P9" style:family="paragraph" style:parent-style-name="Preformatted_20_Text">
      <style:paragraph-properties fo:margin-left="0in" fo:margin-right="0in" fo:margin-top="0in" fo:margin-bottom="0in" style:contextual-spacing="false" style:line-height-at-least="0.2291in" fo:padding="0in" fo:border="none"/>
    </style:style>
    <style:style style:name="P10" style:family="paragraph" style:parent-style-name="Table_20_Contents">
      <style:paragraph-properties fo:margin-left="0in" fo:margin-right="0in" style:line-height-at-least="0.2602in" fo:text-indent="0in" style:auto-text-indent="false"/>
      <style:text-properties fo:font-variant="normal" fo:text-transform="none" style:font-name="quote-cjk-patch" fo:font-size="11.25pt" fo:font-style="normal" fo:font-weight="normal"/>
    </style:style>
    <style:style style:name="P11" style:family="paragraph" style:parent-style-name="Table_20_Contents">
      <style:paragraph-properties fo:margin-left="0in" fo:margin-right="0in" style:line-height-at-least="0.2291in" fo:text-indent="0in" style:auto-text-indent="false"/>
    </style:style>
    <style:style style:name="P12" style:family="paragraph" style:parent-style-name="Table_20_Heading">
      <style:paragraph-properties fo:margin-left="0in" fo:margin-right="0in" style:line-height-at-least="0.2602in" fo:text-align="start" style:justify-single-word="false" fo:text-indent="0in" style:auto-text-indent="false"/>
      <style:text-properties fo:font-variant="normal" fo:text-transform="none" style:font-name="quote-cjk-patch" fo:font-size="11.25pt" fo:font-style="normal" fo:font-weight="bold"/>
    </style:style>
    <style:style style:name="P13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/>
    </style:style>
    <style:style style:name="P14" style:family="paragraph" style:parent-style-name="Text_20_body">
      <style:paragraph-properties fo:margin-left="0in" fo:margin-right="0in" fo:margin-top="0.1665in" fo:margin-bottom="0.1665in" style:contextual-spacing="false" style:line-height-at-least="0.2291in" fo:orphans="2" fo:widows="2" fo:text-indent="0in" style:auto-text-indent="false"/>
    </style:style>
    <style:style style:name="P15" style:family="paragraph" style:parent-style-name="Text_20_body" style:list-style-name="L1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16" style:family="paragraph" style:parent-style-name="Text_20_body" style:list-style-name="L2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17" style:family="paragraph" style:parent-style-name="Text_20_body" style:list-style-name="L4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18" style:family="paragraph" style:parent-style-name="Text_20_body" style:list-style-name="L5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19" style:family="paragraph" style:parent-style-name="Text_20_body" style:list-style-name="L6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20" style:family="paragraph" style:parent-style-name="Text_20_body">
      <style:paragraph-properties fo:margin-left="0.0835in" fo:margin-right="0in" style:line-height-at-least="0.1874in" fo:text-indent="0in" style:auto-text-indent="false"/>
      <style:text-properties fo:font-variant="normal" fo:text-transform="none" fo:color="#0f1115" loext:opacity="100%" style:font-name="Menlo" fo:font-size="9pt" fo:font-style="normal" fo:font-weight="normal" fo:background-color="#ffffff" loext:padding="0in" loext:border="none"/>
    </style:style>
    <style:style style:name="P21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2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1" style:family="text">
      <style:text-properties style:font-name="quote-cjk-patch" fo:font-size="16.5pt" fo:font-style="normal" fo:font-weight="bold"/>
    </style:style>
    <style:style style:name="T2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3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4" style:family="text"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T5" style:family="text"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T6" style:family="text">
      <style:text-properties fo:font-variant="normal" fo:text-transform="none" fo:color="#0f1115" loext:opacity="100%" style:font-name="Menlo" fo:font-size="12pt" fo:letter-spacing="normal" fo:font-style="normal" fo:font-weight="normal" fo:background-color="#ebeef2" loext:char-shading-value="0" loext:padding="0in" loext:border="none"/>
    </style:style>
    <style:style style:name="T7" style:family="text">
      <style:text-properties fo:font-variant="normal" fo:text-transform="none" fo:color="#0f1115" loext:opacity="100%" style:font-name="Menlo" fo:font-size="16.5pt" fo:letter-spacing="normal" fo:font-style="normal" fo:font-weight="bold" fo:background-color="#ebeef2" loext:char-shading-value="0" loext:padding="0in" loext:border="none"/>
    </style:style>
    <style:style style:name="T8" style:family="text">
      <style:text-properties fo:font-variant="normal" fo:text-transform="none" fo:color="#0f1115" loext:opacity="100%" style:font-name="Menlo" fo:font-size="15pt" fo:letter-spacing="normal" fo:font-style="normal" fo:font-weight="bold" fo:background-color="#ebeef2" loext:char-shading-value="0" loext:padding="0in" loext:border="none"/>
    </style:style>
    <style:style style:name="T9" style:family="text">
      <style:text-properties fo:font-variant="normal" fo:text-transform="none" style:font-name="quote-cjk-patch" fo:font-size="11.25pt" fo:font-style="normal" fo:font-weight="normal"/>
    </style:style>
    <style:style style:name="T10" style:family="text">
      <style:text-properties fo:font-variant="normal" fo:text-transform="none" style:font-name="Menlo" fo:font-size="9.75pt" fo:font-style="normal" fo:font-weight="normal" fo:background-color="#ebeef2" loext:char-shading-value="0" loext:padding="0in" loext:border="none"/>
    </style:style>
    <style:style style:name="T11" style:family="text">
      <style:text-properties style:font-name="Menlo" fo:font-size="9.75pt" fo:font-style="normal" fo:font-weight="normal"/>
    </style:style>
    <style:style style:name="T12" style:family="text">
      <style:text-properties fo:color="#a626a4" loext:opacity="100%"/>
    </style:style>
    <style:style style:name="T13" style:family="text">
      <style:text-properties fo:color="#a626a4" loext:opacity="100%" style:font-name="Menlo" fo:font-size="9.75pt" fo:font-style="normal" fo:font-weight="normal"/>
    </style:style>
    <style:style style:name="T14" style:family="text">
      <style:text-properties fo:color="#383a42" loext:opacity="100%"/>
    </style:style>
    <style:style style:name="T15" style:family="text">
      <style:text-properties fo:color="#383a42" loext:opacity="100%" style:font-name="Menlo" fo:font-size="9.75pt" fo:font-style="normal" fo:font-weight="normal"/>
    </style:style>
    <style:style style:name="T16" style:family="text">
      <style:text-properties fo:color="#b76b01" loext:opacity="100%"/>
    </style:style>
    <style:style style:name="T17" style:family="text">
      <style:text-properties fo:color="#50a14f" loext:opacity="100%"/>
    </style:style>
    <style:style style:name="T18" style:family="text">
      <style:text-properties fo:color="#50a14f" loext:opacity="100%" style:font-name="Menlo" fo:font-size="9.75pt" fo:font-style="normal" fo:font-weight="normal"/>
    </style:style>
    <style:style style:name="T19" style:family="text">
      <style:text-properties fo:color="#4078f2" loext:opacity="100%"/>
    </style:style>
    <style:style style:name="T20" style:family="text">
      <style:text-properties fo:color="#4078f2" loext:opacity="100%" style:font-name="Menlo" fo:font-size="9.75pt" fo:font-style="normal" fo:font-weight="normal"/>
    </style:style>
    <style:style style:name="T21" style:family="text">
      <style:text-properties fo:color="#a0a1a7" loext:opacity="100%" fo:font-style="italic"/>
    </style:style>
    <style:style style:name="T22" style:family="text">
      <style:text-properties fo:color="#a0a1a7" loext:opacity="100%" style:font-name="Menlo" fo:font-size="9.75pt" fo:font-style="italic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🎯 <text:span text:style-name="T1">AULA 2 — DISPLAY, ACCEPT, PIC E A PRIMEIRA CALCULADORA</text:span></text:h>
      <text:p text:style-name="P13"><text:span text:style-name="Strong_20_Emphasis"><text:span text:style-name="T2">Objetivo:</text:span></text:span><text:span text:style-name="T3"> Tornar o teu programa COBOL </text:span><text:span text:style-name="Strong_20_Emphasis"><text:span text:style-name="T2">interativo</text:span></text:span><text:span text:style-name="T3">. Ele vai olhar para o utilizador, pedir dados, fazer cálculos e responder de forma inteligente. No final, terás uma calculadora funcional e saberás usar as principais ferramentas de entrada e saída.</text:span></text:p>
      <text:p text:style-name="P14"><text:span text:style-name="T3">Abre o VS Code, cria um ficheiro novo chamado </text:span><text:span text:style-name="Source_20_Text"><text:span text:style-name="T6">AULA2-CALCULADORA.cob</text:span></text:span><text:span text:style-name="T3"> (podes guardá-lo na tua pasta de estudos). Vamos a isto.</text:span></text:p>
      <text:p text:style-name="Horizontal_20_Line"/>
      <text:h text:style-name="P3" text:outline-level="2"><text:span text:style-name="T4">1. Onde as variáveis moram: </text:span><text:span text:style-name="Source_20_Text"><text:span text:style-name="T7">WORKING-STORAGE</text:span></text:span></text:h>
      <text:p text:style-name="P14"><text:span text:style-name="T3">Em C# crias variáveis em qualquer linha. No COBOL, </text:span><text:span text:style-name="Strong_20_Emphasis"><text:span text:style-name="T2">todas as variáveis</text:span></text:span><text:span text:style-name="T3"> têm de ser declaradas primeiro, dentro da </text:span><text:span text:style-name="Source_20_Text"><text:span text:style-name="T6">DATA DIVISION</text:span></text:span><text:span text:style-name="T3">, na secção </text:span><text:span text:style-name="Source_20_Text"><text:span text:style-name="T6">WORKING-STORAGE SECTION</text:span></text:span><text:span text:style-name="T3">. É aqui que dizes ao programa que tipo de dados ele vai manipular.</text:span></text:p>
      <text:p text:style-name="P20">cobol</text:p>
      <text:p text:style-name="P6"><text:span text:style-name="T12">DATA</text:span> <text:span text:style-name="T12">DIVISION</text:span><text:span text:style-name="T14">.</text:span></text:p>
      <text:p text:style-name="P6"><text:span text:style-name="T12">WORKING-STORAGE</text:span> <text:span text:style-name="T12">SECTION</text:span><text:span text:style-name="T14">.</text:span></text:p>
      <text:p text:style-name="P6"><text:span text:style-name="T16">01</text:span> <text:s/>WS-NOME <text:s text:c="3"/><text:span text:style-name="T12">PIC</text:span> <text:span text:style-name="T16">X</text:span><text:span text:style-name="T14">(</text:span><text:span text:style-name="T16">30</text:span><text:span text:style-name="T14">).</text:span></text:p>
      <text:p text:style-name="P6"><text:span text:style-name="T16">01</text:span> <text:s/>WS-IDADE <text:s text:c="2"/><text:span text:style-name="T12">PIC</text:span> <text:span text:style-name="T16">9</text:span><text:span text:style-name="T14">(</text:span><text:span text:style-name="T16">03</text:span><text:span text:style-name="T14">).</text:span></text:p>
      <text:list text:style-name="L1">
        <text:list-item>
          <text:p text:style-name="P15"><text:span text:style-name="Strong_20_Emphasis"><text:span text:style-name="Source_20_Text"><text:span text:style-name="T6">01</text:span></text:span></text:span><text:span text:style-name="T3"> é o nível principal (como uma gaveta).</text:span></text:p>
        </text:list-item>
        <text:list-item>
          <text:p text:style-name="P15"><text:span text:style-name="Strong_20_Emphasis"><text:span text:style-name="Source_20_Text"><text:span text:style-name="T6">WS-</text:span></text:span></text:span><text:span text:style-name="T3"> é uma convenção para "Working Storage" (variável de trabalho). Não é obrigatório, mas mostra profissionalismo.</text:span></text:p>
        </text:list-item>
      </text:list>
      <text:p text:style-name="Horizontal_20_Line"/>
      <text:h text:style-name="P3" text:outline-level="2"><text:span text:style-name="T4">2. O feitiço do </text:span><text:span text:style-name="Source_20_Text"><text:span text:style-name="T7">PIC</text:span></text:span><text:span text:style-name="T4"> (Picture)</text:span></text:h>
      <text:p text:style-name="P14"><text:span text:style-name="T3">O </text:span><text:span text:style-name="Source_20_Text"><text:span text:style-name="T6">PIC</text:span></text:span><text:span text:style-name="T3"> define o </text:span><text:span text:style-name="Strong_20_Emphasis"><text:span text:style-name="T2">tipo</text:span></text:span><text:span text:style-name="T3"> e o </text:span><text:span text:style-name="Strong_20_Emphasis"><text:span text:style-name="T2">tamanho</text:span></text:span><text:span text:style-name="T3"> de cada variável. É o equivalente ao </text:span><text:span text:style-name="Source_20_Text"><text:span text:style-name="T6">int</text:span></text:span><text:span text:style-name="T3">, </text:span><text:span text:style-name="Source_20_Text"><text:span text:style-name="T6">string</text:span></text:span><text:span text:style-name="T3">, </text:span><text:span text:style-name="Source_20_Text"><text:span text:style-name="T6">decimal</text:span></text:span><text:span text:style-name="T3"> do C#, mas com tamanhos fixos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ext:soft-page-break/>
          <table:table-row>
            <table:table-cell table:style-name="Table1.A1" office:value-type="string">
              <text:p text:style-name="P12">Tipo de dado</text:p>
            </table:table-cell>
            <table:table-cell table:style-name="Table1.A1" office:value-type="string">
              <text:p text:style-name="P12">Exemplo COBOL</text:p>
            </table:table-cell>
            <table:table-cell table:style-name="Table1.A1" office:value-type="string">
              <text:p text:style-name="P12">Tradução C#</text:p>
            </table:table-cell>
            <table:table-cell table:style-name="Table1.A1" office:value-type="string">
              <text:p text:style-name="P12">O que armazena</text:p>
            </table:table-cell>
          </table:table-row>
        </table:table-header-rows>
        <table:table-row>
          <table:table-cell table:style-name="Table1.A2" office:value-type="string">
            <text:p text:style-name="P10">Texto</text:p>
          </table:table-cell>
          <table:table-cell table:style-name="Table1.A2" office:value-type="string">
            <text:p text:style-name="P11"><text:span text:style-name="Source_20_Text"><text:span text:style-name="T10">PIC X(20)</text:span></text:span></text:p>
          </table:table-cell>
          <table:table-cell table:style-name="Table1.A2" office:value-type="string">
            <text:p text:style-name="P11"><text:span text:style-name="Source_20_Text"><text:span text:style-name="T10">string</text:span></text:span><text:span text:style-name="T9"> de tamanho 20</text:span></text:p>
          </table:table-cell>
          <table:table-cell table:style-name="Table1.A2" office:value-type="string">
            <text:p text:style-name="P10">20 caracteres (letras, números, símbolos)</text:p>
          </table:table-cell>
        </table:table-row>
        <table:table-row>
          <table:table-cell table:style-name="Table1.A2" office:value-type="string">
            <text:p text:style-name="P10">Número inteiro</text:p>
          </table:table-cell>
          <table:table-cell table:style-name="Table1.A2" office:value-type="string">
            <text:p text:style-name="P11"><text:span text:style-name="Source_20_Text"><text:span text:style-name="T10">PIC 9(03)</text:span></text:span></text:p>
          </table:table-cell>
          <table:table-cell table:style-name="Table1.A2" office:value-type="string">
            <text:p text:style-name="P11"><text:span text:style-name="Source_20_Text"><text:span text:style-name="T10">int</text:span></text:span><text:span text:style-name="T9"> (0–999)</text:span></text:p>
          </table:table-cell>
          <table:table-cell table:style-name="Table1.A2" office:value-type="string">
            <text:p text:style-name="P10">Até 3 dígitos, só positivos</text:p>
          </table:table-cell>
        </table:table-row>
        <table:table-row>
          <table:table-cell table:style-name="Table1.A2" office:value-type="string">
            <text:p text:style-name="P10">Número com sinal</text:p>
          </table:table-cell>
          <table:table-cell table:style-name="Table1.A2" office:value-type="string">
            <text:p text:style-name="P11"><text:span text:style-name="Source_20_Text"><text:span text:style-name="T10">PIC S9(03)</text:span></text:span></text:p>
          </table:table-cell>
          <table:table-cell table:style-name="Table1.A2" office:value-type="string">
            <text:p text:style-name="P11"><text:span text:style-name="Source_20_Text"><text:span text:style-name="T10">int</text:span></text:span><text:span text:style-name="T9"> (com negativo)</text:span></text:p>
          </table:table-cell>
          <table:table-cell table:style-name="Table1.A2" office:value-type="string">
            <text:p text:style-name="P10">Até 3 dígitos, positivos ou negativos</text:p>
          </table:table-cell>
        </table:table-row>
        <table:table-row>
          <table:table-cell table:style-name="Table1.A2" office:value-type="string">
            <text:p text:style-name="P10">Decimal exato</text:p>
          </table:table-cell>
          <table:table-cell table:style-name="Table1.A2" office:value-type="string">
            <text:p text:style-name="P11"><text:span text:style-name="Source_20_Text"><text:span text:style-name="T10">PIC 9(03)V99</text:span></text:span></text:p>
          </table:table-cell>
          <table:table-cell table:style-name="Table1.A2" office:value-type="string">
            <text:p text:style-name="P11"><text:span text:style-name="Source_20_Text"><text:span text:style-name="T10">decimal</text:span></text:span><text:span text:style-name="T9"> com 2 casas</text:span></text:p>
          </table:table-cell>
          <table:table-cell table:style-name="Table1.A2" office:value-type="string">
            <text:p text:style-name="P11"><text:span text:style-name="T9">3 dígitos inteiros + 2 decimais (o </text:span><text:span text:style-name="Source_20_Text"><text:span text:style-name="T10">V</text:span></text:span><text:span text:style-name="T9"> é a vírgula invisível)</text:span></text:p>
          </table:table-cell>
        </table:table-row>
      </table:table>
      <text:p text:style-name="P14"><text:span text:style-name="Strong_20_Emphasis"><text:span text:style-name="T2">A magia do </text:span></text:span><text:span text:style-name="Strong_20_Emphasis"><text:span text:style-name="Source_20_Text"><text:span text:style-name="T6">V</text:span></text:span></text:span><text:span text:style-name="Strong_20_Emphasis"><text:span text:style-name="T2">:</text:span></text:span><text:span text:style-name="T3"><text:line-break/></text:span><text:span text:style-name="Source_20_Text"><text:span text:style-name="T6">PIC 9(03)V99</text:span></text:span><text:span text:style-name="T3"> guarda 5 dígitos. Se guardares </text:span><text:span text:style-name="Source_20_Text"><text:span text:style-name="T6">12345</text:span></text:span><text:span text:style-name="T3">, o COBOL lê como </text:span><text:span text:style-name="Strong_20_Emphasis"><text:span text:style-name="T2">123,45</text:span></text:span><text:span text:style-name="T3">. Não há arredondamentos, não há floats malucos. É a precisão absoluta dos bancos.</text:span></text:p>
      <text:p text:style-name="Horizontal_20_Line"/>
      <text:h text:style-name="P3" text:outline-level="2"><text:span text:style-name="T4">3. </text:span><text:span text:style-name="Source_20_Text"><text:span text:style-name="T7">DISPLAY</text:span></text:span><text:span text:style-name="T4"> — Escrever no ecrã</text:span></text:h>
      <text:p text:style-name="P14"><text:span text:style-name="T3">Para mostrar mensagens e valores, usas o </text:span><text:span text:style-name="Source_20_Text"><text:span text:style-name="T6">DISPLAY</text:span></text:span><text:span text:style-name="T3">.</text:span></text:p>
      <text:p text:style-name="P20">cobol</text:p>
      <text:p text:style-name="P6"><text:span text:style-name="T12">DISPLAY</text:span> <text:span text:style-name="T17">"Olá, "</text:span> WS-NOME <text:span text:style-name="T17">"! Tens "</text:span> WS-IDADE <text:span text:style-name="T17">" anos."</text:span><text:span text:style-name="T14">.</text:span></text:p>
      <text:list text:style-name="L2">
        <text:list-item>
          <text:p text:style-name="P16"><text:span text:style-name="T3">Separas texto e variáveis </text:span><text:span text:style-name="Strong_20_Emphasis"><text:span text:style-name="T2">apenas com espaços</text:span></text:span><text:span text:style-name="T3">. Nada de </text:span><text:span text:style-name="Source_20_Text"><text:span text:style-name="T6">+</text:span></text:span><text:span text:style-name="T3"> para concatenar.</text:span></text:p>
        </text:list-item>
        <text:list-item>
          <text:p text:style-name="P16"><text:span text:style-name="T3">Podes mostrar texto sozinho: </text:span><text:span text:style-name="Source_20_Text"><text:span text:style-name="T6">DISPLAY "Bem-vindo!".</text:span></text:span></text:p>
        </text:list-item>
      </text:list>
      <text:p text:style-name="Horizontal_20_Line"/>
      <text:h text:style-name="P3" text:outline-level="2"><text:span text:style-name="T4">4. </text:span><text:span text:style-name="Source_20_Text"><text:span text:style-name="T7">ACCEPT</text:span></text:span><text:span text:style-name="T4"> — Ler do teclado</text:span></text:h>
      <text:p text:style-name="P14"><text:span text:style-name="T3">Para o programa pausar e esperar que o utilizador digite algo, usas o </text:span><text:span text:style-name="Source_20_Text"><text:span text:style-name="T6">ACCEPT</text:span></text:span><text:span text:style-name="T3">.</text:span></text:p>
      <text:p text:style-name="P20">cobol</text:p>
      <text:p text:style-name="P6"><text:span text:style-name="T12">ACCEPT</text:span> WS-NOME<text:span text:style-name="T14">.</text:span></text:p>
      <text:list text:style-name="L3">
        <text:list-item>
          <text:p text:style-name="P21">O utilizador escreve e pressiona Enter.</text:p>
        </text:list-item>
        <text:list-item>
          <text:p text:style-name="P21">O valor digitado é guardado diretamente na variável.</text:p>
        </text:list-item>
      </text:list>
      <text:p text:style-name="Horizontal_20_Line"/>
      <text:h text:style-name="P3" text:outline-level="2"><text:soft-page-break/><text:span text:style-name="T4">5. Operações matemáticas: </text:span><text:span text:style-name="Source_20_Text"><text:span text:style-name="T7">COMPUTE</text:span></text:span><text:span text:style-name="T4"> e o símbolo de divisão </text:span><text:span text:style-name="Source_20_Text"><text:span text:style-name="T7">/</text:span></text:span></text:h>
      <text:p text:style-name="P22">Podes fazer contas de duas formas no COBOL:</text:p>
      <text:h text:style-name="P4" text:outline-level="3"><text:span text:style-name="T5">a) Com </text:span><text:span text:style-name="Source_20_Text"><text:span text:style-name="T8">COMPUTE</text:span></text:span><text:span text:style-name="T5"> (estilo matemático, familiar para quem vem do C#)</text:span></text:h>
      <text:p text:style-name="P20">cobol</text:p>
      <text:p text:style-name="P6"><text:span text:style-name="T12">COMPUTE</text:span> WS-RESULTADO <text:span text:style-name="T19">=</text:span> WS-NUM1 <text:span text:style-name="T19">+</text:span> WS-NUM2<text:span text:style-name="T14">.</text:span></text:p>
      <text:p text:style-name="P6"><text:span text:style-name="T12">COMPUTE</text:span> WS-DIVISAO <text:s text:c="2"/><text:span text:style-name="T19">=</text:span> WS-NUM1 <text:span text:style-name="T19">/</text:span> WS-NUM2<text:span text:style-name="T14">.</text:span></text:p>
      <text:list text:style-name="L4">
        <text:list-item>
          <text:p text:style-name="P17"><text:span text:style-name="T3">Usa </text:span><text:span text:style-name="Source_20_Text"><text:span text:style-name="T6">+</text:span></text:span><text:span text:style-name="T3">, </text:span><text:span text:style-name="Source_20_Text"><text:span text:style-name="T6">-</text:span></text:span><text:span text:style-name="T3">, </text:span><text:span text:style-name="Source_20_Text"><text:span text:style-name="T6">*</text:span></text:span><text:span text:style-name="T3">, </text:span><text:span text:style-name="Source_20_Text"><text:span text:style-name="T6">/</text:span></text:span><text:span text:style-name="T3">, </text:span><text:span text:style-name="Source_20_Text"><text:span text:style-name="T6">**</text:span></text:span><text:span text:style-name="T3"> (potência).</text:span></text:p>
        </text:list-item>
        <text:list-item>
          <text:p text:style-name="P17"><text:span text:style-name="T3">A divisão com </text:span><text:span text:style-name="Source_20_Text"><text:span text:style-name="T6">/</text:span></text:span><text:span text:style-name="T3"> </text:span><text:span text:style-name="Strong_20_Emphasis"><text:span text:style-name="T2">trunca a parte decimal</text:span></text:span><text:span text:style-name="T3"> se as variáveis forem inteiras. Para ter decimais, declara a variável de resultado com </text:span><text:span text:style-name="Source_20_Text"><text:span text:style-name="T6">V</text:span></text:span><text:span text:style-name="T3"> (ex: </text:span><text:span text:style-name="Source_20_Text"><text:span text:style-name="T6">PIC 9(03)V99</text:span></text:span><text:span text:style-name="T3">).</text:span></text:p>
        </text:list-item>
      </text:list>
      <text:h text:style-name="P5" text:outline-level="3">b) Com verbos em inglês (estilo COBOL tradicional)</text:h>
      <text:list text:style-name="L5">
        <text:list-item>
          <text:p text:style-name="P18"><text:span text:style-name="Strong_20_Emphasis"><text:span text:style-name="Source_20_Text"><text:span text:style-name="T6">ADD A TO B</text:span></text:span></text:span><text:span text:style-name="T3"> (B = B + A)</text:span></text:p>
        </text:list-item>
        <text:list-item>
          <text:p text:style-name="P18"><text:span text:style-name="Strong_20_Emphasis"><text:span text:style-name="Source_20_Text"><text:span text:style-name="T6">SUBTRACT A FROM B</text:span></text:span></text:span><text:span text:style-name="T3"> (B = B – A)</text:span></text:p>
        </text:list-item>
        <text:list-item>
          <text:p text:style-name="P18"><text:span text:style-name="Strong_20_Emphasis"><text:span text:style-name="Source_20_Text"><text:span text:style-name="T6">MULTIPLY A BY B</text:span></text:span></text:span><text:span text:style-name="T3"> (B = A * B)</text:span></text:p>
        </text:list-item>
        <text:list-item>
          <text:p text:style-name="P18"><text:span text:style-name="Strong_20_Emphasis"><text:span text:style-name="Source_20_Text"><text:span text:style-name="T6">DIVIDE A INTO B GIVING C</text:span></text:span></text:span><text:span text:style-name="T3"> (C = B ÷ A) – cuidado com a ordem!</text:span></text:p>
        </text:list-item>
        <text:list-item>
          <text:p text:style-name="P18"><text:span text:style-name="Strong_20_Emphasis"><text:span text:style-name="Source_20_Text"><text:span text:style-name="T6">DIVIDE A BY B GIVING C</text:span></text:span></text:span><text:span text:style-name="T3"> (C = A ÷ B) – mais intuitivo.</text:span></text:p>
        </text:list-item>
        <text:list-item>
          <text:p text:style-name="P18"><text:span text:style-name="Strong_20_Emphasis"><text:span text:style-name="Source_20_Text"><text:span text:style-name="T6">DIVIDE A BY B GIVING C REMAINDER D</text:span></text:span></text:span><text:span text:style-name="T3"> → guarda também o resto da divisão.</text:span></text:p>
        </text:list-item>
      </text:list>
      <text:p text:style-name="Horizontal_20_Line"/>
      <text:h text:style-name="P1" text:outline-level="2">🧪 <text:span text:style-name="T1">Mão na massa: a calculadora oficial</text:span></text:h>
      <text:p text:style-name="P14"><text:span text:style-name="T3">Copia este código para o teu ficheiro </text:span><text:span text:style-name="Source_20_Text"><text:span text:style-name="T6">AULA2-CALCULADORA.cob</text:span></text:span><text:span text:style-name="T3">. Ele pede dois números e faz todas as operações.</text:span></text:p>
      <text:p text:style-name="P20">cobol</text:p>
      <text:p text:style-name="P7">*&gt; Antunes Jamba</text:p>
      <text:p text:style-name="P7">*&gt; Aula 2 - Oficial: Calculadora Interativa</text:p>
      <text:p text:style-name="P6"><text:span text:style-name="T12">IDENTIFICATION</text:span> <text:span text:style-name="T12">DIVISION</text:span><text:span text:style-name="T14">.</text:span></text:p>
      <text:p text:style-name="P6"><text:span text:style-name="T12">PROGRAM-ID</text:span><text:span text:style-name="T14">.</text:span> CALCULADORA<text:span text:style-name="T14">.</text:span></text:p>
      <text:p text:style-name="P9"><text:soft-page-break/></text:p>
      <text:p text:style-name="P6"><text:span text:style-name="T12">DATA</text:span> <text:span text:style-name="T12">DIVISION</text:span><text:span text:style-name="T14">.</text:span></text:p>
      <text:p text:style-name="P6"><text:span text:style-name="T12">WORKING-STORAGE</text:span> <text:span text:style-name="T12">SECTION</text:span><text:span text:style-name="T14">.</text:span></text:p>
      <text:p text:style-name="P6"><text:span text:style-name="T16">01</text:span> <text:s/>WS-NUM1 <text:s text:c="5"/><text:span text:style-name="T12">PIC</text:span> <text:span text:style-name="T16">9</text:span><text:span text:style-name="T14">(</text:span><text:span text:style-name="T16">03</text:span><text:span text:style-name="T14">).</text:span></text:p>
      <text:p text:style-name="P6"><text:span text:style-name="T16">01</text:span> <text:s/>WS-NUM2 <text:s text:c="5"/><text:span text:style-name="T12">PIC</text:span> <text:span text:style-name="T16">9</text:span><text:span text:style-name="T14">(</text:span><text:span text:style-name="T16">03</text:span><text:span text:style-name="T14">).</text:span></text:p>
      <text:p text:style-name="P6"><text:span text:style-name="T16">01</text:span> <text:s/>WS-SOMA <text:s text:c="5"/><text:span text:style-name="T12">PIC</text:span> <text:span text:style-name="T16">9</text:span><text:span text:style-name="T14">(</text:span><text:span text:style-name="T16">04</text:span><text:span text:style-name="T14">).</text:span></text:p>
      <text:p text:style-name="P6"><text:span text:style-name="T16">01</text:span> <text:s/>WS-SUB <text:s text:c="6"/><text:span text:style-name="T12">PIC</text:span> <text:span text:style-name="T16">S9</text:span><text:span text:style-name="T14">(</text:span><text:span text:style-name="T16">04</text:span><text:span text:style-name="T14">).</text:span> <text:s text:c="5"/><text:span text:style-name="T21">*&gt; S para permitir resultado negativo</text:span></text:p>
      <text:p text:style-name="P6"><text:span text:style-name="T16">01</text:span> <text:s/>WS-MULT <text:s text:c="5"/><text:span text:style-name="T12">PIC</text:span> <text:span text:style-name="T16">9</text:span><text:span text:style-name="T14">(</text:span><text:span text:style-name="T16">06</text:span><text:span text:style-name="T14">).</text:span></text:p>
      <text:p text:style-name="P6"><text:span text:style-name="T16">01</text:span> <text:s/>WS-DIVISAO <text:s text:c="2"/><text:span text:style-name="T12">PIC</text:span> <text:span text:style-name="T16">9</text:span><text:span text:style-name="T14">(</text:span><text:span text:style-name="T16">03</text:span><text:span text:style-name="T14">)</text:span><text:span text:style-name="T16">V99</text:span><text:span text:style-name="T14">.</text:span> <text:s text:c="3"/><text:span text:style-name="T21">*&gt; V99 para guardar cêntimos</text:span></text:p>
      <text:p text:style-name="P6"><text:span text:style-name="T16">01</text:span> <text:s/>WS-RESTO <text:s text:c="4"/><text:span text:style-name="T12">PIC</text:span> <text:span text:style-name="T16">9</text:span><text:span text:style-name="T14">(</text:span><text:span text:style-name="T16">03</text:span><text:span text:style-name="T14">).</text:span></text:p>
      <text:p text:style-name="P9"/>
      <text:p text:style-name="P6"><text:span text:style-name="T12">PROCEDURE</text:span> <text:span text:style-name="T12">DIVISION</text:span><text:span text:style-name="T14">.</text:span></text:p>
      <text:p text:style-name="P6">MAIN-PROCEDURE<text:span text:style-name="T14">.</text:span></text:p>
      <text:p text:style-name="P8"><text:s text:c="4"/><text:span text:style-name="T13">DISPLAY</text:span><text:span text:style-name="T11"> </text:span><text:span text:style-name="T18">"===== CALCULADORA COBOL OFICIAL ====="</text:span><text:span text:style-name="T15">.</text:span></text:p>
      <text:p text:style-name="P8"><text:s text:c="4"/><text:span text:style-name="T13">DISPLAY</text:span><text:span text:style-name="T11"> </text:span><text:span text:style-name="T18">" "</text:span><text:span text:style-name="T15">.</text:span></text:p>
      <text:p text:style-name="P8"><text:s text:c="4"/><text:span text:style-name="T13">DISPLAY</text:span><text:span text:style-name="T11"> </text:span><text:span text:style-name="T18">"Digite o primeiro numero (max 3 digitos): "</text:span><text:span text:style-name="T15">.</text:span></text:p>
      <text:p text:style-name="P8"><text:s text:c="4"/><text:span text:style-name="T13">ACCEPT</text:span><text:span text:style-name="T11"> WS-NUM1</text:span><text:span text:style-name="T15">.</text:span></text:p>
      <text:p text:style-name="P8"><text:s text:c="4"/><text:span text:style-name="T13">DISPLAY</text:span><text:span text:style-name="T11"> </text:span><text:span text:style-name="T18">"Digite o segundo numero (max 3 digitos): "</text:span><text:span text:style-name="T15">.</text:span></text:p>
      <text:p text:style-name="P8"><text:s text:c="4"/><text:span text:style-name="T13">ACCEPT</text:span><text:span text:style-name="T11"> WS-NUM2</text:span><text:span text:style-name="T15">.</text:span></text:p>
      <text:p text:style-name="P9"/>
      <text:p text:style-name="P8"><text:s text:c="4"/><text:span text:style-name="T13">COMPUTE</text:span><text:span text:style-name="T11"> WS-SOMA <text:s text:c="3"/></text:span><text:span text:style-name="T20">=</text:span><text:span text:style-name="T11"> WS-NUM1 </text:span><text:span text:style-name="T20">+</text:span><text:span text:style-name="T11"> WS-NUM2</text:span><text:span text:style-name="T15">.</text:span></text:p>
      <text:p text:style-name="P8"><text:s text:c="4"/><text:span text:style-name="T13">COMPUTE</text:span><text:span text:style-name="T11"> WS-SUB <text:s text:c="4"/></text:span><text:span text:style-name="T20">=</text:span><text:span text:style-name="T11"> WS-NUM1 </text:span><text:span text:style-name="T20">-</text:span><text:span text:style-name="T11"> WS-NUM2</text:span><text:span text:style-name="T15">.</text:span></text:p>
      <text:p text:style-name="P8"><text:s text:c="4"/><text:span text:style-name="T13">COMPUTE</text:span><text:span text:style-name="T11"> WS-MULT <text:s text:c="3"/></text:span><text:span text:style-name="T20">=</text:span><text:span text:style-name="T11"> WS-NUM1 </text:span><text:span text:style-name="T20">*</text:span><text:span text:style-name="T11"> WS-NUM2</text:span><text:span text:style-name="T15">.</text:span></text:p>
      <text:p text:style-name="P8"><text:s text:c="4"/><text:span text:style-name="T13">COMPUTE</text:span><text:span text:style-name="T11"> WS-DIVISAO </text:span><text:span text:style-name="T20">=</text:span><text:span text:style-name="T11"> WS-NUM1 </text:span><text:span text:style-name="T20">/</text:span><text:span text:style-name="T11"> WS-NUM2</text:span><text:span text:style-name="T15">.</text:span></text:p>
      <text:p text:style-name="P9"/>
      <text:p text:style-name="P8"><text:s text:c="4"/><text:span text:style-name="T13">DISPLAY</text:span><text:span text:style-name="T11"> </text:span><text:span text:style-name="T18">" "</text:span><text:span text:style-name="T15">.</text:span></text:p>
      <text:p text:style-name="P8"><text:s text:c="4"/><text:span text:style-name="T13">DISPLAY</text:span><text:span text:style-name="T11"> </text:span><text:span text:style-name="T18">"Resultados:"</text:span><text:span text:style-name="T15">.</text:span></text:p>
      <text:p text:style-name="P8"><text:s text:c="4"/><text:span text:style-name="T13">DISPLAY</text:span><text:span text:style-name="T11"> </text:span><text:span text:style-name="T18">"Soma: <text:s text:c="7"/>"</text:span><text:span text:style-name="T11"> WS-SOMA</text:span><text:span text:style-name="T15">.</text:span></text:p>
      <text:p text:style-name="P8"><text:s text:c="4"/><text:span text:style-name="T13">DISPLAY</text:span><text:span text:style-name="T11"> </text:span><text:span text:style-name="T18">"Subtracao: <text:s text:c="2"/>"</text:span><text:span text:style-name="T11"> WS-SUB</text:span><text:span text:style-name="T15">.</text:span></text:p>
      <text:p text:style-name="P8"><text:s text:c="4"/><text:span text:style-name="T13">DISPLAY</text:span><text:span text:style-name="T11"> </text:span><text:span text:style-name="T18">"Multiplicacao: "</text:span><text:span text:style-name="T11"> WS-MULT</text:span><text:span text:style-name="T15">.</text:span></text:p>
      <text:p text:style-name="P8"><text:s text:c="4"/><text:span text:style-name="T13">DISPLAY</text:span><text:span text:style-name="T11"> </text:span><text:span text:style-name="T18">"Divisao: <text:s text:c="4"/>"</text:span><text:span text:style-name="T11"> WS-DIVISAO</text:span><text:span text:style-name="T15">.</text:span></text:p>
      <text:p text:style-name="P9"/>
      <text:p text:style-name="P8"><text:s text:c="4"/><text:span text:style-name="T22">*&gt; Calculando também o resto da divisão</text:span></text:p>
      <text:p text:style-name="P8"><text:s text:c="4"/><text:span text:style-name="T13">DIVIDE</text:span><text:span text:style-name="T11"> WS-NUM1 </text:span><text:span text:style-name="T13">BY</text:span><text:span text:style-name="T11"> WS-NUM2 </text:span><text:span text:style-name="T13">GIVING</text:span><text:span text:style-name="T11"> WS-DIVISAO </text:span><text:span text:style-name="T13">REMAINDER</text:span><text:span text:style-name="T11"> WS-RESTO</text:span><text:span text:style-name="T15">.</text:span></text:p>
      <text:p text:style-name="P8"><text:s text:c="4"/><text:span text:style-name="T13">DISPLAY</text:span><text:span text:style-name="T11"> </text:span><text:span text:style-name="T18">"Resto da divisao: "</text:span><text:span text:style-name="T11"> WS-RESTO</text:span><text:span text:style-name="T15">.</text:span></text:p>
      <text:p text:style-name="P9"/>
      <text:p text:style-name="P8"><text:s text:c="4"/><text:span text:style-name="T13">DISPLAY</text:span><text:span text:style-name="T11"> </text:span><text:span text:style-name="T18">" "</text:span><text:span text:style-name="T15">.</text:span></text:p>
      <text:p text:style-name="P8"><text:s text:c="4"/><text:span text:style-name="T13">DISPLAY</text:span><text:span text:style-name="T11"> </text:span><text:span text:style-name="T18">"Obrigado por usar a Calculadora COBOL!"</text:span><text:span text:style-name="T15">.</text:span></text:p>
      <text:p text:style-name="P8"><text:s text:c="4"/><text:span text:style-name="T13">STOP</text:span><text:span text:style-name="T11"> </text:span><text:span text:style-name="T13">RUN</text:span><text:span text:style-name="T15">.</text:span></text:p>
      <text:p text:style-name="P13"><text:span text:style-name="Strong_20_Emphasis"><text:span text:style-name="T2">Executa no terminal:</text:span></text:span></text:p>
      <text:p text:style-name="P20"><text:soft-page-break/>bash</text:p>
      <text:p text:style-name="P6">cobc <text:span text:style-name="T19">-x</text:span> <text:span text:style-name="T19">-free</text:span> AULA2-CALCULADORA.cob <text:span text:style-name="T19">-o</text:span> calc <text:span text:style-name="T19">&amp;&amp;</text:span> ./calc</text:p>
      <text:p text:style-name="Horizontal_20_Line"/>
      <text:h text:style-name="P1" text:outline-level="2">🏋️ <text:span text:style-name="T1">Desafio de casa (obrigatório para fixares)</text:span></text:h>
      <text:p text:style-name="P14"><text:span text:style-name="T3">Cria um novo programa chamado </text:span><text:span text:style-name="Source_20_Text"><text:span text:style-name="T6">AULA2-DESAFIO.cob</text:span></text:span><text:span text:style-name="T3"> com as seguintes características:</text:span></text:p>
      <text:list text:style-name="L6">
        <text:list-item>
          <text:p text:style-name="P19"><text:span text:style-name="T3">Pergunta o nome do utilizador e guarda em </text:span><text:span text:style-name="Source_20_Text"><text:span text:style-name="T6">PIC X(30)</text:span></text:span><text:span text:style-name="T3">.</text:span></text:p>
        </text:list-item>
        <text:list-item>
          <text:p text:style-name="P19"><text:span text:style-name="T3">Pergunta dois números (podes usar </text:span><text:span text:style-name="Source_20_Text"><text:span text:style-name="T6">PIC 9(03)V99</text:span></text:span><text:span text:style-name="T3"> para aceitar valores com cêntimos; lembra-te que o utilizador terá de digitar a vírgula? Na verdade, com </text:span><text:span text:style-name="Source_20_Text"><text:span text:style-name="T6">ACCEPT</text:span></text:span><text:span text:style-name="T3"> e </text:span><text:span text:style-name="Source_20_Text"><text:span text:style-name="T6">PIC 9(03)V99</text:span></text:span><text:span text:style-name="T3">, o COBOL espera que digites os dígitos sem vírgula, ex: </text:span><text:span text:style-name="Source_20_Text"><text:span text:style-name="T6">12345</text:span></text:span><text:span text:style-name="T3"> para </text:span><text:span text:style-name="Source_20_Text"><text:span text:style-name="T6">123,45</text:span></text:span><text:span text:style-name="T3">. Podes simplificar e usar só inteiros.)</text:span></text:p>
        </text:list-item>
        <text:list-item>
          <text:p text:style-name="P19"><text:span text:style-name="T3">Calcula a soma e a divisão, e mostra o resultado personalizado:<text:line-break/></text:span><text:span text:style-name="Source_20_Text"><text:span text:style-name="T6">"Olá, Antunes! A soma é 42 e a divisão é 3.14."</text:span></text:span></text:p>
        </text:list-item>
      </text:list>
      <text:p text:style-name="P22">Faz commit e push para o teu GitHub.</text:p>
      <text:p text:style-name="Horizontal_20_Line"/>
      <text:h text:style-name="P1" text:outline-level="2">📌 <text:span text:style-name="T1">Resumo da Aula 2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2">Conceito</text:p>
            </table:table-cell>
            <table:table-cell table:style-name="Table2.A1" office:value-type="string">
              <text:p text:style-name="P12">O que faz</text:p>
            </table:table-cell>
            <table:table-cell table:style-name="Table2.A1" office:value-type="string">
              <text:p text:style-name="P12">Exemplo</text:p>
            </table:table-cell>
          </table:table-row>
        </table:table-header-rows>
        <table:table-row>
          <table:table-cell table:style-name="Table2.A2" office:value-type="string">
            <text:p text:style-name="P11"><text:span text:style-name="Source_20_Text"><text:span text:style-name="T10">WORKING-STORAGE</text:span></text:span></text:p>
          </table:table-cell>
          <table:table-cell table:style-name="Table2.A2" office:value-type="string">
            <text:p text:style-name="P10">Área para declarar variáveis</text:p>
          </table:table-cell>
          <table:table-cell table:style-name="Table2.A2" office:value-type="string">
            <text:p text:style-name="P11"><text:span text:style-name="Source_20_Text"><text:span text:style-name="T10">01 WS-NOME PIC X(20).</text:span></text:span></text:p>
          </table:table-cell>
        </table:table-row>
        <table:table-row>
          <table:table-cell table:style-name="Table2.A2" office:value-type="string">
            <text:p text:style-name="P11"><text:span text:style-name="Source_20_Text"><text:span text:style-name="T10">PIC X(n)</text:span></text:span></text:p>
          </table:table-cell>
          <table:table-cell table:style-name="Table2.A2" office:value-type="string">
            <text:p text:style-name="P10">Texto com tamanho fixo</text:p>
          </table:table-cell>
          <table:table-cell table:style-name="Table2.A2" office:value-type="string">
            <text:p text:style-name="P11"><text:span text:style-name="Source_20_Text"><text:span text:style-name="T10">PIC X(30)</text:span></text:span></text:p>
          </table:table-cell>
        </table:table-row>
        <table:table-row>
          <table:table-cell table:style-name="Table2.A2" office:value-type="string">
            <text:p text:style-name="P11"><text:span text:style-name="Source_20_Text"><text:span text:style-name="T10">PIC 9(n)</text:span></text:span></text:p>
          </table:table-cell>
          <table:table-cell table:style-name="Table2.A2" office:value-type="string">
            <text:p text:style-name="P10">Número inteiro positivo</text:p>
          </table:table-cell>
          <table:table-cell table:style-name="Table2.A2" office:value-type="string">
            <text:p text:style-name="P11"><text:span text:style-name="Source_20_Text"><text:span text:style-name="T10">PIC 9(03)</text:span></text:span></text:p>
          </table:table-cell>
        </table:table-row>
        <table:table-row>
          <table:table-cell table:style-name="Table2.A2" office:value-type="string">
            <text:p text:style-name="P11"><text:span text:style-name="Source_20_Text"><text:span text:style-name="T10">PIC S9(n)</text:span></text:span></text:p>
          </table:table-cell>
          <table:table-cell table:style-name="Table2.A2" office:value-type="string">
            <text:p text:style-name="P10">Número com sinal negativo</text:p>
          </table:table-cell>
          <table:table-cell table:style-name="Table2.A2" office:value-type="string">
            <text:p text:style-name="P11"><text:span text:style-name="Source_20_Text"><text:span text:style-name="T10">PIC S9(04)</text:span></text:span></text:p>
          </table:table-cell>
        </table:table-row>
        <table:table-row>
          <table:table-cell table:style-name="Table2.A2" office:value-type="string">
            <text:p text:style-name="P11"><text:span text:style-name="Source_20_Text"><text:span text:style-name="T10">PIC 9(n)V99</text:span></text:span></text:p>
          </table:table-cell>
          <table:table-cell table:style-name="Table2.A2" office:value-type="string">
            <text:p text:style-name="P10">Número com decimais exatos</text:p>
          </table:table-cell>
          <table:table-cell table:style-name="Table2.A2" office:value-type="string">
            <text:p text:style-name="P11"><text:span text:style-name="Source_20_Text"><text:span text:style-name="T10">PIC 9(03)V99</text:span></text:span></text:p>
          </table:table-cell>
        </table:table-row>
        <table:table-row>
          <table:table-cell table:style-name="Table2.A2" office:value-type="string">
            <text:p text:style-name="P11"><text:span text:style-name="Source_20_Text"><text:span text:style-name="T10">DISPLAY</text:span></text:span></text:p>
          </table:table-cell>
          <table:table-cell table:style-name="Table2.A2" office:value-type="string">
            <text:p text:style-name="P10">Escrever no ecrã</text:p>
          </table:table-cell>
          <table:table-cell table:style-name="Table2.A2" office:value-type="string">
            <text:p text:style-name="P11"><text:span text:style-name="Source_20_Text"><text:span text:style-name="T10">DISPLAY "Olá"</text:span></text:span></text:p>
          </table:table-cell>
        </table:table-row>
        <table:table-row>
          <table:table-cell table:style-name="Table2.A2" office:value-type="string">
            <text:p text:style-name="P11"><text:span text:style-name="Source_20_Text"><text:span text:style-name="T10">ACCEPT</text:span></text:span></text:p>
          </table:table-cell>
          <table:table-cell table:style-name="Table2.A2" office:value-type="string">
            <text:p text:style-name="P10">Ler do teclado</text:p>
          </table:table-cell>
          <table:table-cell table:style-name="Table2.A2" office:value-type="string">
            <text:p text:style-name="P11"><text:span text:style-name="Source_20_Text"><text:span text:style-name="T10">ACCEPT WS-IDADE</text:span></text:span></text:p>
          </table:table-cell>
        </table:table-row>
        <table:table-row>
          <table:table-cell table:style-name="Table2.A2" office:value-type="string">
            <text:p text:style-name="P11"><text:span text:style-name="Source_20_Text"><text:span text:style-name="T10">COMPUTE</text:span></text:span></text:p>
          </table:table-cell>
          <table:table-cell table:style-name="Table2.A2" office:value-type="string">
            <text:p text:style-name="P10">Fazer cálculos com símbolos</text:p>
          </table:table-cell>
          <table:table-cell table:style-name="Table2.A2" office:value-type="string">
            <text:p text:style-name="P11"><text:span text:style-name="Source_20_Text"><text:span text:style-name="T10">COMPUTE A = B + C</text:span></text:span></text:p>
          </table:table-cell>
        </table:table-row>
        <table:table-row>
          <table:table-cell table:style-name="Table2.A2" office:value-type="string">
            <text:p text:style-name="P11"><text:span text:style-name="Source_20_Text"><text:span text:style-name="T10">DIVIDE...BY...</text:span></text:span></text:p>
          </table:table-cell>
          <table:table-cell table:style-name="Table2.A2" office:value-type="string">
            <text:p text:style-name="P10">Dividir e obter resto</text:p>
          </table:table-cell>
          <table:table-cell table:style-name="Table2.A2" office:value-type="string">
            <text:p text:style-name="P11"><text:span text:style-name="Source_20_Text"><text:span text:style-name="T10">DIVIDE A BY B GIVING C REMAINDER D</text:span></text:span></text:p>
          </table:table-cell>
        </table:table-row>
      </table:table>
      <text:p text:style-name="Text_20_body"><text:soft-pag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1T22:23:07.168824601</meta:creation-date>
    <dc:date>2026-07-01T22:23:36.830939019</dc:date>
    <meta:editing-duration>PT31S</meta:editing-duration>
    <meta:editing-cycles>1</meta:editing-cycles>
    <meta:document-statistic meta:table-count="2" meta:image-count="0" meta:object-count="0" meta:page-count="6" meta:paragraph-count="143" meta:word-count="920" meta:character-count="5432" meta:non-whitespace-character-count="4498"/>
    <meta:generator>LibreOffice/24.2.7.2$Linux_X86_64 LibreOffice_project/420$Build-2</meta:generator>
  </office:meta>
</office:document-meta>
</file>